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5000000236E1FFF9B03ED9494.png" manifest:media-type="image/png"/>
  <manifest:file-entry manifest:full-path="Pictures/100027FC00000C6700000457C87E8BB6F128B3AA.svg" manifest:media-type="image/svg+xml"/>
  <manifest:file-entry manifest:full-path="Pictures/100000010000008C000000374CCE1123187A504C.png" manifest:media-type="image/png"/>
  <manifest:file-entry manifest:full-path="Pictures/100012FE00001118000006B5118A7191D32BCF9E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</office:automatic-styles>
  <office:body>
    <office:text>
      <text:h text:style-name="Heading_20_1" text:outline-level="1"><text:bookmark-start text:name="flujo-de-trabajo-distribuido"/>Flujo de Trabajo Distribuido<text:bookmark-end text:name="flujo-de-trabajo-distribuido"/></text:h>
      <text:p text:style-name="First_20_paragraph">Hasta ahora hemos visto cómo trabajar en solitario con Git en nuestra propia computadora. Pero, ¿qué pasa cuando queremos compartir nuestro código con el mundo o trabajar junto a otros compañeros? Aquí es donde entra en juego el <text:span text:style-name="Strong_20_Emphasis">Flujo de Trabajo Distribuido</text:span>.</text:p>
      <text:p text:style-name="Horizontal_20_Line"/>
      <text:h text:style-name="Heading_20_2" text:outline-level="2"><text:bookmark-start text:name="introducción-del-entorno-local-al-colaborativo"/>1. Introducción: Del Entorno Local al Colaborativo<text:bookmark-end text:name="introducción-del-entorno-local-al-colaborativo"/></text:h>
      <text:p text:style-name="First_20_paragraph">En el flujo local, tu historial de cambios vive únicamente en tu máquina. Si tu computadora se rompe, pierdes todo el proyecto y su evolución. Además, no tienes forma de que otra persona vea tu código sin enviárselo manualmente (por email o USB).</text:p>
      <text:p text:style-name="Text_20_body">El flujo distribuido soluciona esto utilizando un <text:span text:style-name="Strong_20_Emphasis">Repositorio Remoto</text:span>. Este actúa como un servidor centralizado (como GitHub, GitLab o Bitbucket) que contiene una copia completa del proyecto y permite que todos los miembros del equipo sincronicen sus trabajos.</text:p>
      <text:p text:style-name="Horizontal_20_Line"/>
      <text:h text:style-name="Heading_20_2" text:outline-level="2"><text:bookmark-start text:name="qué-es-un-repositorio-remoto"/>2. ¿Qué es un Repositorio Remoto?<text:bookmark-end text:name="qué-es-un-repositorio-remoto"/></text:h>
      <text:p text:style-name="First_20_paragraph">Un repositorio remoto es una copia del proyecto alojada en un servidor accesible a través de internet. No es solo un “almacén” de archivos; es una base de datos Git completa que permite:</text:p>
      <text:list text:style-name="List_20_1">
        <text:list-item>
          <text:p text:style-name="List_20_Bullet_20_Tight"><text:span text:style-name="Strong_20_Emphasis">Sincronización</text:span>: Subir tus cambios (<text:span text:style-name="Source_20_Text">push</text:span>) y descargar los de otros (<text:span text:style-name="Source_20_Text">pull</text:span>).</text:p>
        </text:list-item>
        <text:list-item>
          <text:p text:style-name="List_20_Bullet_20_Tight"><text:span text:style-name="Strong_20_Emphasis">Respaldo (Backup)</text:span>: Si algo falla localmente, siempre puedes recuperar el proyecto desde el servidor.</text:p>
        </text:list-item>
        <text:list-item>
          <text:p text:style-name="List_20_Bullet_20_Tight"><text:span text:style-name="Strong_20_Emphasis">Colaboración</text:span>: Es el punto de encuentro donde todos los desarrolladores integran su trabajo.</text:p>
        </text:list-item>
      </text:list>
      <text:p text:style-name="First_20_paragraph">En Git, por convención, la dirección del servidor remoto principal se identifica con el nombre corto: <text:span text:style-name="Source_20_Text">origin</text:span>.</text:p>
      <text:p text:style-name="Horizontal_20_Line"/>
      <text:h text:style-name="Heading_20_2" text:outline-level="2"><text:bookmark-start text:name="escenarios-para-empezar-a-trabajar-con-remotos"/>3. Escenarios para empezar a trabajar con Remotos<text:bookmark-end text:name="escenarios-para-empezar-a-trabajar-con-remotos"/></text:h>
      <text:p text:style-name="First_20_paragraph">Dependiendo de dónde haya empezado el proyecto, existen dos caminos principales para conectar tu trabajo con la nube.</text:p>
      <text:h text:style-name="Heading_20_3" text:outline-level="3"><text:bookmark-start text:name="escenario-a-el-repositorio-ya-existe-en-la-nube-clonación"/>Escenario A: El Repositorio ya existe en la nube (Clonación)<text:bookmark-end text:name="escenario-a-el-repositorio-ya-existe-en-la-nube-clonación"/></text:h>
      <text:p text:style-name="First_20_paragraph">Es el caso más común cuando te unes a un proyecto ya iniciado. El código ya está en GitHub y tú necesitas una copia para empezar a trabajar.</text:p>
      <text:p text:style-name="Text_20_body"><text:span text:style-name="Strong_20_Emphasis">Flujo:</text:span> 1. <text:span text:style-name="Strong_20_Emphasis">Descargar</text:span>: Obtienes una copia completa del repositorio remoto en tu PC. 2. <text:span text:style-name="Strong_20_Emphasis">Trabajar</text:span>: Realizas tus cambios, <text:span text:style-name="Source_20_Text">add</text:span> y <text:span text:style-name="Source_20_Text">commit</text:span> de forma local. 3. <text:span text:style-name="Strong_20_Emphasis">Sincronizar</text:span>: Envías tus cambios al servidor remoto.</text:p>
      <text:h text:style-name="Heading_20_3" text:outline-level="3"><text:bookmark-start text:name="escenario-b-tú-tienes-el-proyecto-y-quieres-subirlo-vinculación"/>Escenario B: Tú tienes el proyecto y quieres subirlo (Vinculación)<text:bookmark-end text:name="escenario-b-tú-tienes-el-proyecto-y-quieres-subirlo-vinculación"/></text:h>
      <text:p text:style-name="First_20_paragraph">Es el caso cuando has empezado un proyecto en tu ordenador y ahora decides crear un repositorio en GitHub para compartirlo o respaldarlo.</text:p>
      <text:p text:style-name="Text_20_body"><text:span text:style-name="Strong_20_Emphasis">Flujo:</text:span> 1. <text:span text:style-name="Strong_20_Emphasis">Crear remoto</text:span>: Creas un repositorio <text:span text:style-name="Strong_20_Emphasis">vacío</text:span> en la plataforma (GitHub/GitLab). 2. <text:span text:style-name="Strong_20_Emphasis">Vincular</text:span>: Conectas tu carpeta local con la dirección URL del nuevo repositorio remoto. 3. <text:span text:style-name="Strong_20_Emphasis">Subir</text:span>: Envías tus commits locales al servidor por primera vez.</text:p>
      <text:p text:style-name="Horizontal_20_Line"/>
      <text:h text:style-name="Heading_20_2" text:outline-level="2"><text:bookmark-start text:name="escenario-a-clonar-un-repositorio-existente-flujo-básico"/>4. Escenario A: Clonar un Repositorio Existente (Flujo Básico)<text:bookmark-end text:name="escenario-a-clonar-un-repositorio-existente-flujo-básico"/></text:h>
      <text:p text:style-name="First_20_paragraph">Para trabajar sobre un proyecto que ya está en internet, utilizamos el comando <text:span text:style-name="Source_20_Text">git clone</text:span>.</text:p>
      <text:h text:style-name="Heading_20_3" text:outline-level="3"><text:bookmark-start text:name="paso-1-clonar"/>Paso 1: Clonar<text:bookmark-end text:name="paso-1-clonar"/></text:h>
      <text:p text:style-name="First_20_paragraph">Debes obtener la URL del repositorio (normalmente termina en <text:span text:style-name="Source_20_Text">.git</text:span>).</text:p>
      <text:p text:style-name="Preformatted_20_Text">git clone https://github.com/usuario/proyecto-existente.git</text:p>
      <text:p text:style-name="First_20_paragraph">Este comando hace tres cosas a la vez: crea una carpeta con el nombre del proyecto, descarga todos los archivos y configura automáticamente la conexión con el servidor remoto (<text:span text:style-name="Source_20_Text">origin</text:span>).</text:p>
      <text:h text:style-name="Heading_20_3" text:outline-level="3"><text:bookmark-start text:name="paso-2-trabajar-y-confirmar"/>Paso 2: Trabajar y Confirmar<text:bookmark-end text:name="paso-2-trabajar-y-confirmar"/></text:h>
      <text:p text:style-name="First_20_paragraph">Una vez dentro de la carpeta, trabajas como siempre:</text:p>
      <text:p text:style-name="Preformatted_20_Text"># Crear un nuevo archivo</text:p>
      <text:p text:style-name="Preformatted_20_Text">echo "Nueva funcionalidad" &gt; feature.txt</text:p>
      <text:p text:style-name="Preformatted_20_Text"/>
      <text:p text:style-name="Preformatted_20_Text"># Preparar y confirmar</text:p>
      <text:p text:style-name="Preformatted_20_Text">git add feature.txt</text:p>
      <text:p text:style-name="Preformatted_20_Text">git commit -m "Añadida la funcionalidad de prueba"</text:p>
      <text:h text:style-name="Heading_20_3" text:outline-level="3"><text:bookmark-start text:name="paso-3-enviar-cambios-al-remoto-push"/>Paso 3: Enviar cambios al remoto (Push)<text:bookmark-end text:name="paso-3-enviar-cambios-al-remoto-push"/></text:h>
      <text:p text:style-name="First_20_paragraph">Para que tus compañeros vean tus cambios, debes “empujarlos” al servidor:</text:p>
      <text:p text:style-name="Preformatted_20_Text">git push</text:p>
      <text:p text:style-name="Horizontal_20_Line"/>
      <text:h text:style-name="Heading_20_2" text:outline-level="2"><text:bookmark-start text:name="escenario-b-vincular-un-repositorio-local-con-uno-remoto-flujo-alternativo"/>5. Escenario B: Vincular un Repositorio Local con uno Remoto (Flujo Alternativo)<text:bookmark-end text:name="escenario-b-vincular-un-repositorio-local-con-uno-remoto-flujo-alternativo"/></text:h>
      <text:p text:style-name="First_20_paragraph">Si ya tienes una carpeta con un historial de commits local y quieres conectarla a un nuevo repositorio en GitHub, sigue estos pasos cuidadosamente.</text:p>
      <text:h text:style-name="Heading_20_3" text:outline-level="3"><text:bookmark-start text:name="paso-1-crear-el-repositorio-remoto"/>Paso 1: Crear el repositorio remoto<text:bookmark-end text:name="paso-1-crear-el-repositorio-remoto"/></text:h>
      <text:p text:style-name="First_20_paragraph">Ve a GitHub y crea un nuevo repositorio. <text:span text:style-name="Strong_20_Emphasis">IMPORTANTE</text:span>: No selecciones las opciones “Add a README file”, “Add .gitignore” o “Choose a license”. El repositorio debe estar <text:span text:style-name="Strong_20_Emphasis">totalmente vacío</text:span> para evitar conflictos de historias no relacionadas.</text:p>
      <text:h text:style-name="Heading_20_3" text:outline-level="3"><text:bookmark-start text:name="paso-2-vincular-el-repositorio-local"/>Paso 2: Vincular el repositorio local<text:bookmark-end text:name="paso-2-vincular-el-repositorio-local"/></text:h>
      <text:p text:style-name="First_20_paragraph">En tu terminal, dentro de la carpeta de tu proyecto local, indica a Git cuál es la dirección del servidor remoto:</text:p>
      <text:p text:style-name="Preformatted_20_Text">git remote add origin https://github.com/tu-usuario/tu-proyecto.git</text:p>
      <text:h text:style-name="Heading_20_3" text:outline-level="3"><text:bookmark-start text:name="paso-3-primer-envío-y-configuración-de-seguimiento"/>Paso 3: Primer envío y configuración de seguimiento<text:bookmark-end text:name="paso-3-primer-envío-y-configuración-de-seguimiento"/></text:h>
      <text:p text:style-name="First_20_paragraph">La primera vez que subas cambios, debes indicarle a Git con qué rama del servidor quieres conectar tu rama local. Usamos el parámetro <text:span text:style-name="Source_20_Text">-u</text:span> (o <text:span text:style-name="Source_20_Text">--set-upstream</text:span>) para que Git “recuerde” esta conexión para el futuro.</text:p>
      <text:p text:style-name="Preformatted_20_Text"># Si tu rama local se llama 'master'</text:p>
      <text:p text:style-name="Preformatted_20_Text">git push -u origin master</text:p>
      <text:p text:style-name="Preformatted_20_Text"/>
      <text:p text:style-name="Preformatted_20_Text"># O si usas la convención moderna 'main'</text:p>
      <text:p text:style-name="Preformatted_20_Text">git push -u origin main</text:p>
      <text:p text:style-name="First_20_paragraph">A partir de este momento, en el futuro solo necesitarás escribir <text:span text:style-name="Source_20_Text">git push</text:span> o <text:span text:style-name="Source_20_Text">git pull</text:span>, ya que Git ya sabe que tu rama está vinculada a <text:span text:style-name="Source_20_Text">origin</text:span>.</text:p>
      <text:p text:style-name="Horizontal_20_Line"/>
      <text:h text:style-name="Heading_20_2" text:outline-level="2"><text:bookmark-start text:name="comandos-clave-de-sincronización"/>6. Comandos Clave de Sincronización<text:bookmark-end text:name="comandos-clave-de-sincronizació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omando</text:p>
            </table:table-cell>
            <table:table-cell table:style-name="TableHeaderRowCell" office:value-type="string">
              <text:p text:style-name="Table_20_Heading">Acción</text:p>
            </table:table-cell>
            <table:table-cell table:style-name="TableHeaderRowCell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20_Text">git remote -v</text:span></text:p>
          </table:table-cell>
          <table:table-cell table:style-name="TableRowCell" office:value-type="string">
            <text:p text:style-name="Table_20_Contents">Ver remotos</text:p>
          </table:table-cell>
          <table:table-cell table:style-name="TableRowCell" office:value-type="string">
            <text:p text:style-name="Table_20_Contents">Muestra las URLs de los servidores remotos vinculados a tu proyecto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it push</text:span></text:p>
          </table:table-cell>
          <table:table-cell table:style-name="TableRowCell" office:value-type="string">
            <text:p text:style-name="Table_20_Contents">Enviar</text:p>
          </table:table-cell>
          <table:table-cell table:style-name="TableRowCell" office:value-type="string">
            <text:p text:style-name="Table_20_Contents">Sube tus commits locales al repositorio remoto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it pull</text:span></text:p>
          </table:table-cell>
          <table:table-cell table:style-name="TableRowCell" office:value-type="string">
            <text:p text:style-name="Table_20_Contents">Traer</text:p>
          </table:table-cell>
          <table:table-cell table:style-name="TableRowCell" office:value-type="string">
            <text:p text:style-name="Table_20_Contents">Descarga los cambios del servidor y los mezcla con tu trabajo local.</text:p>
          </table:table-cell>
        </table:table-row>
        <table:table-row>
          <table:table-cell table:style-name="TableRowCell" office:value-type="string">
            <text:p text:style-name="Table_20_Contents"><text:span text:style-name="Source_20_Text">git clone &lt;url&gt;</text:span></text:p>
          </table:table-cell>
          <table:table-cell table:style-name="TableRowCell" office:value-type="string">
            <text:p text:style-name="Table_20_Contents">Clonar</text:p>
          </table:table-cell>
          <table:table-cell table:style-name="TableRowCell" office:value-type="string">
            <text:p text:style-name="Table_20_Contents">Descarga un proyecto completo desde la nube a tu PC.</text:p>
          </table:table-cell>
        </table:table-row>
      </table:table>
      <text:p text:style-name="Horizontal_20_Line"/>
      <text:h text:style-name="Heading_20_2" text:outline-level="2"><text:bookmark-start text:name="conceptos-importantes-origin-y-las-ramas"/>7. Conceptos Importantes: <text:span text:style-name="Source_20_Text">origin</text:span> y las Ramas<text:bookmark-end text:name="conceptos-importantes-origin-y-las-ramas"/></text:h>
      <text:list text:style-name="List_20_1">
        <text:list-item>
          <text:p text:style-name="List_20_Bullet_20_Tight"><text:span text:style-name="Strong_20_Emphasis">¿Qué es </text:span><text:span text:style-name="Source_20_Text">origin</text:span><text:span text:style-name="Strong_20_Emphasis">?</text:span>: No es una palabra mágica de Git, es simplemente un <text:span text:style-name="Strong_20_Emphasis">alias</text:span> (un sobrenombre). En lugar de escribir la URL larguísima <text:span text:style-name="Source_20_Text">https://github.com/usuario/proyecto.git</text:span> cada vez que quieras subir algo, simplemente escribes <text:span text:style-name="Source_20_Text">origin</text:span>.</text:p>
        </text:list-item>
        <text:list-item>
          <text:p text:style-name="List_20_Bullet_20_Tight"><text:span text:style-name="Strong_20_Emphasis">Especificar la rama</text:span>: Al hacer un push o pull, siempre es buena práctica (y a veces obligatorio) especificar el destino: <text:span text:style-name="Source_20_Text">origin</text:span> (el servidor) y <text:span text:style-name="Source_20_Text">main</text:span> (la rama). Por ejemplo: <text:span text:style-name="Source_20_Text">git push origin main</text:span>.</text:p>
        </text:list-item>
      </text:list>
      <text:p text:style-name="Horizontal_20_Line"/>
      <text:h text:style-name="Heading_20_2" text:outline-level="2"><text:bookmark-start text:name="actividades-de-aprendizaje"/>8. Actividades de Aprendizaje<text:bookmark-end text:name="actividades-de-aprendizaje"/></text:h>
      <text:h text:style-name="Heading_20_3" text:outline-level="3"><text:bookmark-start text:name="actividad-1-simulación-de-clonación"/>Actividad 1: Simulación de Clonación<text:bookmark-end text:name="actividad-1-simulación-de-clonación"/></text:h>
      <text:p text:style-name="First_20_paragraph"><text:span text:style-name="Strong_20_Emphasis">Objetivo</text:span>: Practicar el flujo de descarga y subida.</text:p>
      <text:list text:style-name="Numbering_20_1">
        <text:list-item>
          <text:p text:style-name="List_20_Number_20_Tight">Imagina que tienes la URL de un repositorio: <text:span text:style-name="Source_20_Text">https://github.com/ejemplo/proyecto-test.git</text:span>.</text:p>
        </text:list-item>
        <text:list-item>
          <text:p text:style-name="List_20_Number_20_Tight">Escribe los comandos necesarios para:</text:p>
          <text:list text:style-name="List_20_1">
            <text:list-item>
              <text:p text:style-name="List_20_Bullet_20_Tight">Clonar ese repositorio en una carpeta llamada <text:span text:style-name="Source_20_Text">mi_test</text:span>.</text:p>
            </text:list-item>
            <text:list-item>
              <text:p text:style-name="List_20_Bullet_20_Tight">Entrar en esa carpeta.</text:p>
            </text:list-item>
            <text:list-item>
              <text:p text:style-name="List_20_Bullet_20_Tight">Crear un archivo <text:span text:style-name="Source_20_Text">hola.txt</text:span>.</text:p>
            </text:list-item>
            <text:list-item>
              <text:p text:style-name="List_20_Bullet_20_Tight">Hacer el proceso de <text:span text:style-name="Source_20_Text">add</text:span> y <text:span text:style-name="Source_20_Text">commit</text:span>.</text:p>
            </text:list-item>
            <text:list-item>
              <text:p text:style-name="List_20_Bullet_20_Tight">Subir los cambios al servidor.</text:p>
            </text:list-item>
          </text:list>
        </text:list-item>
      </text:list>
      <text:h text:style-name="Heading_20_3" text:outline-level="3"><text:bookmark-start text:name="actividad-2-el-rescate-de-un-proyecto-local"/>Actividad 2: El Rescate de un Proyecto Local<text:bookmark-end text:name="actividad-2-el-rescate-de-un-proyecto-local"/></text:h>
      <text:p text:style-name="First_20_paragraph"><text:span text:style-name="Strong_20_Emphasis">Objetivo</text:span>: Aprender a conectar un trabajo previo con la nube.</text:p>
      <text:p text:style-name="Text_20_body">Tienes una carpeta en tu PC llamada <text:span text:style-name="Source_20_Text">proyecto_personal</text:span> que ya tiene archivos y commits, pero no está en internet.</text:p>
      <text:list text:style-name="Numbering_20_1">
        <text:list-item>
          <text:p text:style-name="List_20_Number_20_Tight">Escribe los comandos para:</text:p>
          <text:list text:style-name="List_20_1">
            <text:list-item>
              <text:p text:style-name="List_20_Bullet_20_Tight">Crear un repositorio remoto en GitHub (describe el paso).</text:p>
            </text:list-item>
            <text:list-item>
              <text:p text:style-name="List_20_Bullet_20_Tight">Vincular tu carpeta <text:span text:style-name="Source_20_Text">proyecto_personal</text:span> con la URL <text:span text:style-name="Source_20_Text">https://github.com/tu-usuario/proyecto-personal.git</text:span>.</text:p>
            </text:list-item>
            <text:list-item>
              <text:p text:style-name="List_20_Bullet_20_Tight">Subir tu rama principal (asumamos que se llama <text:span text:style-name="Source_20_Text">main</text:span>) por primera vez, configurando el seguimiento automático.</text:p>
            </text:list-item>
          </text:list>
        </text:list-item>
      </text:list>
      <text:p text:style-name="Horizontal_20_Line"/>
      <text:h text:style-name="Heading_20_2" text:outline-level="2"><text:bookmark-start text:name="soluciones-a-las-actividades"/>9. Soluciones a las Actividades<text:bookmark-end text:name="soluciones-a-las-actividades"/></text:h>
      <text:h text:style-name="Heading_20_3" text:outline-level="3"><text:bookmark-start text:name="solución-actividad-1"/>Solución Actividad 1<text:bookmark-end text:name="solución-actividad-1"/></text:h>
      <text:p text:style-name="Preformatted_20_Text">git clone https://github.com/ejemplo/proyecto-test.git mi_test</text:p>
      <text:p text:style-name="Preformatted_20_Text">cd mi_test</text:p>
      <text:p text:style-name="Preformatted_20_Text">touch hola.txt</text:p>
      <text:p text:style-name="Preformatted_20_Text">git add hola.txt</text:p>
      <text:p text:style-name="Preformatted_20_Text">git commit -m "Añadido archivo de saludo"</text:p>
      <text:p text:style-name="Preformatted_20_Text">git push</text:p>
      <text:h text:style-name="Heading_20_3" text:outline-level="3"><text:bookmark-start text:name="solución-actividad-2"/>Solución Actividad 2<text:bookmark-end text:name="solución-actividad-2"/></text:h>
      <text:list text:style-name="Numbering_20_1">
        <text:list-item>
          <text:p text:style-name="List_20_Number_20_Tight"><text:span text:style-name="Strong_20_Emphasis">En GitHub</text:span>: Clic en “New Repository”, nombre <text:span text:style-name="Source_20_Text">proyecto-personal</text:span>, <text:span text:style-name="Strong_20_Emphasis">sin</text:span> marcar README ni licencia. Clic en “Create”.</text:p>
        </text:list-item>
        <text:list-item>
          <text:p text:style-name="List_20_Number_20_Tight"><text:span text:style-name="Strong_20_Emphasis">En la Terminal</text:span>:</text:p>
        </text:list-item>
      </text:list>
      <text:p text:style-name="Preformatted_20_Text">cd proyecto_personal</text:p>
      <text:p text:style-name="Preformatted_20_Text">git remote add origin https://github.com/tu-usuario/proyecto-personal.git</text:p>
      <text:p text:style-name="Preformatted_20_Text">git push -u origin main</text:p>
      <text:p text:style-name="Horizontal_20_Line"/>
      <text:h text:style-name="Heading_20_2" text:outline-level="2"><text:bookmark-start text:name="materiales-para-profundizar"/>10. Materiales para Profundizar<text:bookmark-end text:name="materiales-para-profundizar"/></text:h>
      <text:list text:style-name="List_20_1">
        <text:list-item>
          <text:p text:style-name="List_20_Bullet_20_Tight"><text:span text:style-name="Strong_20_Emphasis">Guía de GitHub</text:span>: Tutoriales oficiales sobre cómo usar Git con su plataforma: <text:a xlink:type="simple" xlink:href="https://docs.github.com/es" office:name=""><text:span text:style-name="Definition">https://docs.github.com/es</text:span></text:a></text:p>
        </text:list-item>
        <text:list-item>
          <text:p text:style-name="List_20_Bullet_20_Tight"><text:span text:style-name="Strong_20_Emphasis">Comandos Remotos</text:span>: Documentación técnica de <text:span text:style-name="Source_20_Text">git remote</text:span>: <text:a xlink:type="simple" xlink:href="https://git-scm.com/docs/git-remote" office:name=""><text:span text:style-name="Definition">https://git-scm.com/docs/git-remote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F Mono" svg:font-family="'SF Mono'" style:font-pitch="variable"/>
    <style:font-face style:name="SF Mono1" svg:font-family="'SF Mono'" style:font-adornments="Norma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2" fo:font-family="Arial" style:font-style-name="Norm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fo:text-align="justify" style:justify-single-word="false" style:writing-mode="lr-tb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 style:master-page-name="">
      <loext:graphic-properties draw:fill="solid" draw:fill-color="#82005e"/>
      <style:paragraph-properties fo:margin-top="0.6cm" fo:margin-bottom="0.4cm" style:contextual-spacing="false" style:page-number="auto" fo:background-color="#82005e" fo:padding="0.199cm" fo:border="0.06pt solid #000000" style:shadow="none" style:writing-mode="lr-tb"/>
      <style:text-properties fo:text-transform="uppercase" fo:color="#ffffff" loext:opacity="100%" style:font-name="Arial1" fo:font-family="Arial" style:font-style-name="Negrita" style:font-family-generic="swiss" style:font-pitch="variable" fo:font-size="18pt" fo:font-weight="bold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Arial1" fo:font-family="Arial" style:font-style-name="Negrita" style:font-family-generic="swiss" style:font-pitch="variable" fo:font-weight="bold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fo:color="#82005e" loext:opacity="100%"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class="html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2a6099" loext:opacity="100%" style:font-name="SF Mono1" fo:font-family="'SF Mono'" style:font-style-name="Normal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 style:parent-style-name="Internet_20_link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2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182cm" fo:margin-left="-0.053cm" fo:margin-top="0cm" fo:margin-bottom="0cm" table:align="left" style:may-break-between-rows="false" style:writing-mode="lr-tb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3.986cm"/>
    </style:style>
    <style:style style:name="Tabla1.1" style:family="table-row">
      <style:table-row-properties style:min-row-height="0.951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457cm" fo:margin-left="-0.191cm" fo:margin-top="0cm" fo:margin-bottom="0cm" table:align="left" style:writing-mode="lr-tb"/>
    </style:style>
    <style:style style:name="Tabla2.A" style:family="table-column">
      <style:table-column-properties style:column-width="3.784cm"/>
    </style:style>
    <style:style style:name="Tabla2.B" style:family="table-column">
      <style:table-column-properties style:column-width="11.501cm"/>
    </style:style>
    <style:style style:name="Tabla2.C" style:family="table-column">
      <style:table-column-properties style:column-width="2.1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/>
    </style:style>
    <style:style style:name="MP1" style:family="paragraph" style:parent-style-name="Header">
      <style:text-properties fo:font-size="3pt" style:font-size-asian="3pt" style:font-size-complex="3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82005e" loext:opacity="100%" style:font-name="Arial Narrow" fo:font-weight="bold" officeooo:rsid="002f20c4" officeooo:paragraph-rsid="0072042a" style:font-weight-asian="bold" style:font-weight-complex="bold"/>
    </style:style>
    <style:style style:name="MP4" style:family="paragraph" style:parent-style-name="Standard">
      <style:paragraph-properties fo:text-align="center" style:justify-single-word="false"/>
      <style:text-properties fo:color="#3d4d59" loext:opacity="100%" style:font-name="Arial Narrow" fo:font-weight="bold" officeooo:rsid="00481002" officeooo:paragraph-rsid="0072042a" style:font-weight-asian="bold" style:font-weight-complex="bold"/>
    </style:style>
    <style:style style:name="MP5" style:family="paragraph" style:parent-style-name="Standard">
      <style:text-properties officeooo:paragraph-rsid="00578e4d"/>
    </style:style>
    <style:style style:name="MP6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"/>
    </style:style>
    <style:style style:name="MT1" style:family="text">
      <style:text-properties officeooo:rsid="00481002"/>
    </style:style>
    <style:style style:name="MT2" style:family="text">
      <style:text-properties style:font-name="Arial" fo:font-size="8pt" officeooo:rsid="0017aa89" style:font-size-asian="8pt" style:font-size-complex="8pt"/>
    </style:style>
    <style:style style:name="MT3" style:family="text">
      <style:text-properties style:font-name="Arial" fo:font-size="8pt" style:font-size-asian="8pt" style:font-size-complex="8pt"/>
    </style:style>
    <style:style style:name="MT4" style:family="text">
      <style:text-properties style:font-name="Arial" fo:font-size="8pt" officeooo:rsid="00578e4d" style:font-size-asian="8pt" style:font-size-complex="8pt"/>
    </style:style>
    <style:style style:name="MT5" style:family="text">
      <style:text-properties style:font-name="SF Mono" fo:font-size="8pt" officeooo:rsid="00578e4d" style:font-size-asian="8pt" style:font-size-complex="8pt"/>
    </style:style>
    <style:style style:name="MT6" style:family="text">
      <style:text-properties style:font-name="SF Mono" fo:font-size="8pt" style:font-size-asian="8pt" style:font-size-complex="8pt"/>
    </style:style>
    <style:style style:name="MT7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fo:background-color="transparent" style:dynamic-spacing="true" draw:fill="none" draw:fill-color="#729fcf"/>
      </style:header-style>
      <style:footer-style>
        <style:header-footer-properties fo:min-height="1.184cm" fo:margin-left="0cm" fo:margin-right="0cm" fo:margin-top="1.08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frame draw:style-name="Mfr1" draw:name="Imagen1" text:anchor-type="as-char" svg:width="3.949cm" svg:height="1.499cm" draw:z-index="0"><draw:image xlink:href="Pictures/100012FE00001118000006B5118A7191D32BCF9E.svg" xlink:type="simple" xlink:show="embed" xlink:actuate="onLoad" draw:mime-type="image/svg+xml"/><draw:image xlink:href="Pictures/100000010000008C000000374CCE1123187A504C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>CFGS – <text:span text:style-name="MT1">DESARROLLO DE APLICACIONES MULTIPLATAFORMA</text:span></text:p>
              <text:p text:style-name="MP4">PROGRAMACIÓN – 2018/2019</text:p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Footer"><draw:frame draw:style-name="Mfr2" draw:name="Imagen3" text:anchor-type="as-char" svg:width="3.175cm" svg:height="1.111cm" draw:z-index="1"><draw:image xlink:href="Pictures/100027FC00000C6700000457C87E8BB6F128B3AA.svg" xlink:type="simple" xlink:show="embed" xlink:actuate="onLoad" draw:mime-type="image/svg+xml"/><draw:image xlink:href="Pictures/1000000100000065000000236E1FFF9B03ED9494.png" xlink:type="simple" xlink:show="embed" xlink:actuate="onLoad" draw:mime-type="image/png"/></draw:frame></text:p>
            </table:table-cell>
            <table:table-cell table:style-name="Tabla2.A1" office:value-type="string">
              <text:p text:style-name="MP5"><text:span text:style-name="MT2">Excepto si se especifica lo contrario, esta obra está bajo l</text:span><text:span text:style-name="MT3">icenci</text:span><text:span text:style-name="MT4">a </text:span><text:a xlink:type="simple" xlink:href="https://creativecommons.org/licenses/by/4.0/deed.es_ES" text:style-name="Internet_20_link" text:visited-style-name="Visited_20_Internet_20_Link"><text:span text:style-name="MT5">CC BY 4.0</text:span></text:a><text:span text:style-name="MT4">.</text:span></text:p>
              <text:p text:style-name="Standard"><text:span text:style-name="MT2">© </text:span><text:span text:style-name="MT2"><text:date style:data-style-name="N10104" text:date-value="2022-09-09T15:07:25.078266318">2022</text:date></text:span><text:span text:style-name="MT2"><text:s/>Departamento de Informática, </text:span><text:a xlink:type="simple" xlink:href="http://www.egibide.org/" text:style-name="Internet_20_link" text:visited-style-name="Visited_20_Internet_20_Link"><text:span text:style-name="MT6">Egibide</text:span></text:a><text:span text:style-name="MT2">. Algunos derechos reservados.</text:span></text:p>
            </table:table-cell>
            <table:table-cell table:style-name="Tabla2.A1" office:value-type="string">
              <text:p text:style-name="MP6"><text:span text:style-name="MT7">Página </text:span><text:span text:style-name="MT7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Descripción del reto</dc:title>
    <meta:editing-cycles>54</meta:editing-cycles>
    <meta:creation-date>2017-05-26T13:24:30.395479000</meta:creation-date>
    <meta:editing-duration>PT3H49M21S</meta:editing-duration>
    <meta:generator>LibreOffice/7.3.5.2$MacOSX_AARCH64 LibreOffice_project/184fe81b8c8c30d8b5082578aee2fed2ea847c01</meta:generator>
    <dc:date>2022-09-09T15:07:24.980877815</dc:date>
    <meta:document-statistic meta:table-count="3" meta:image-count="2" meta:object-count="0" meta:page-count="1" meta:paragraph-count="39" meta:word-count="227" meta:character-count="1341" meta:non-whitespace-character-count="1153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