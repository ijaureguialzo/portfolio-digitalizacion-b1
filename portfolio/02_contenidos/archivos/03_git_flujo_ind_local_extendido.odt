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5000000236E1FFF9B03ED9494.png" manifest:media-type="image/png"/>
  <manifest:file-entry manifest:full-path="Pictures/100027FC00000C6700000457C87E8BB6F128B3AA.svg" manifest:media-type="image/svg+xml"/>
  <manifest:file-entry manifest:full-path="Pictures/100000010000008C000000374CCE1123187A504C.png" manifest:media-type="image/png"/>
  <manifest:file-entry manifest:full-path="Pictures/100012FE00001118000006B5118A7191D32BCF9E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flujo-de-trabajo-individual-local-y-lineal"/>Flujo de Trabajo Individual, Local y Lineal<text:bookmark-end text:name="flujo-de-trabajo-individual-local-y-lineal"/></text:h>
      <text:p text:style-name="First_20_paragraph">En el aprendizaje inicial de Git, el primer modelo que encontramos es el más sencillo: un flujo <text:span text:style-name="Strong_20_Emphasis">individual</text:span>, <text:span text:style-name="Strong_20_Emphasis">local</text:span> y <text:span text:style-name="Strong_20_Emphasis">lineal</text:span>. Es la base sobre la cual se construyen todos los demás métodos de trabajo complejos.</text:p>
      <text:p text:style-name="Horizontal_20_Line"/>
      <text:h text:style-name="Heading_20_2" text:outline-level="2"><text:bookmark-start text:name="introducción-al-flujo-más-simple"/>1. Introducción al Flujo más Simple<text:bookmark-end text:name="introducción-al-flujo-más-simple"/></text:h>
      <text:p text:style-name="First_20_paragraph">Este flujo se caracteriza por tres pilares: * <text:span text:style-name="Strong_20_Emphasis">Individual</text:span>: Solo tú trabajas en el proyecto. No hay otros desarrolladores cuyos cambios debas integrar o con quienes debas coordinarte. * <text:span text:style-name="Strong_20_Emphasis">Local</text:span>: El repositorio reside exclusivamente en tu máquina. No hay un servidor remoto (como GitHub) con el que sincronizar datos; si tu disco duro falla, pierdes todo el historial. * <text:span text:style-name="Strong_20_Emphasis">Lineal</text:span>: Los cambios se suceden unos tras otros en una única línea de tiempo. No existen ramificaciones (<text:span text:style-name="Emphasis">branches</text:span>); la historia es un camino recto de principio a fin.</text:p>
      <text:p text:style-name="Text_20_body"><text:span text:style-name="Strong_20_Emphasis">¿Cuándo usarlo?</text:span> Es ideal para cuando estás aprendiendo los fundamentos de Git, para prototipos rápidos o para proyectos personales muy pequeños que no requieren respaldo en la nube ni colaboración.</text:p>
      <text:p text:style-name="Horizontal_20_Line"/>
      <text:h text:style-name="Heading_20_2" text:outline-level="2"><text:bookmark-start text:name="el-ciclo-de-vida-del-cambio-paso-a-paso"/>2. El Ciclo de Vida del Cambio (Paso a Paso)<text:bookmark-end text:name="el-ciclo-de-vida-del-cambio-paso-a-paso"/></text:h>
      <text:p text:style-name="First_20_paragraph">Para que un cambio pase de ser una simple edición en tu editor de texto a ser parte oficial del historial de Git, debe atravesar tres etapas obligatorias:</text:p>
      <text:h text:style-name="Heading_20_3" text:outline-level="3"><text:bookmark-start text:name="paso-1-modificar-directorio-de-trabajo"/>Paso 1: Modificar (Directorio de Trabajo)<text:bookmark-end text:name="paso-1-modificar-directorio-de-trabajo"/></text:h>
      <text:p text:style-name="First_20_paragraph">Todo empieza en tu <text:span text:style-name="Strong_20_Emphasis">Directorio de Trabajo</text:span> (<text:span text:style-name="Emphasis">Working Directory</text:span>). Aquí es donde creas archivos nuevos, borras otros o editas el contenido de los existentes. En este punto, Git sabe que algo ha cambiado, pero aún no lo está “protegiendo”.</text:p>
      <text:h text:style-name="Heading_20_3" text:outline-level="3"><text:bookmark-start text:name="paso-2-preparar-área-de-preparación-staging-area"/>Paso 2: Preparar (Área de Preparación / Staging Area)<text:bookmark-end text:name="paso-2-preparar-área-de-preparación-staging-area"/></text:h>
      <text:p text:style-name="First_20_paragraph">No todos los cambios que haces en tu carpeta deben ir necesariamente en el siguiente <text:span text:style-name="Emphasis">commit</text:span>. Git te ofrece una zona intermedia llamada <text:span text:style-name="Strong_20_Emphasis">Área de Preparación</text:span> (<text:span text:style-name="Emphasis">Staging Area</text:span>). Al usar el comando <text:span text:style-name="Source_20_Text">git add</text:span>, seleccionas qué archivos (o incluso qué partes de un archivo) quieres incluir en tu próxima “foto” o instantánea del proyecto.</text:p>
      <text:h text:style-name="Heading_20_3" text:outline-level="3"><text:bookmark-start text:name="paso-3-confirmar-repositorio-commit"/>Paso 3: Confirmar (Repositorio / Commit)<text:bookmark-end text:name="paso-3-confirmar-repositorio-commit"/></text:h>
      <text:p text:style-name="First_20_paragraph">Una vez que has preparado tus cambios, utilizas el comando <text:span text:style-name="Source_20_Text">git commit</text:span>. En este momento, Git toma todo lo que está en la <text:span text:style-name="Emphasis">Staging Area</text:span> y crea una <text:span text:style-name="Strong_20_Emphasis">instantánea permanente</text:span> (un <text:span text:style-name="Emphasis">commit</text:span>) en su base de datos interna (<text:span text:style-name="Source_20_Text">.git</text:span>). Este cambio ahora es parte del historial y puede ser recuperado en el futuro.</text:p>
      <text:p text:style-name="Horizontal_20_Line"/>
      <text:h text:style-name="Heading_20_2" text:outline-level="2"><text:bookmark-start text:name="comandos-prácticos-y-su-ejecución"/>3. Comandos Prácticos y su Ejecución<text:bookmark-end text:name="comandos-prácticos-y-su-ejecución"/></text:h>
      <text:p text:style-name="First_20_paragraph">Vamos a ver cómo se ve este proceso en la vida real utilizando la terminal:</text:p>
      <text:h text:style-name="Heading_20_3" text:outline-level="3"><text:bookmark-start text:name="crear-cambios"/>1. Crear cambios<text:bookmark-end text:name="crear-cambios"/></text:h>
      <text:p text:style-name="First_20_paragraph">Imagina que queremos crear un nuevo archivo de texto.</text:p>
      <text:p text:style-name="Preformatted_20_Text">echo "Contenido del fichero A" &gt; a.txt</text:p>
      <text:p text:style-name="First_20_paragraph">Si ejecutamos <text:span text:style-name="Source_20_Text">git status</text:span>, Git nos dirá que hay un archivo <text:span text:style-name="Strong_20_Emphasis">sin seguimiento</text:span> (<text:span text:style-name="Emphasis">untracked</text:span>):</text:p>
      <text:p text:style-name="Preformatted_20_Text">En la rama master</text:p>
      <text:p text:style-name="Preformatted_20_Text">No hay commits todavía</text:p>
      <text:p text:style-name="Preformatted_20_Text">Archivos sin seguimiento:</text:p>
      <text:p text:style-name="Preformatted_20_Text"><text:s text:c="2"/>(usa "git add &lt;archivo&gt;..." para incluirlo a lo que será confirmado)</text:p>
      <text:p text:style-name="Preformatted_20_Text"><text:s text:c="4"/>a.txt</text:p>
      <text:h text:style-name="Heading_20_3" text:outline-level="3"><text:bookmark-start text:name="añadir-al-área-de-preparación-staging"/>2. Añadir al área de preparación (Staging)<text:bookmark-end text:name="añadir-al-área-de-preparación-staging"/></text:h>
      <text:p text:style-name="First_20_paragraph">Para decirle a Git que queremos incluir <text:span text:style-name="Source_20_Text">a.txt</text:span> en nuestro próximo <text:span text:style-name="Emphasis">commit</text:span>:</text:p>
      <text:p text:style-name="Preformatted_20_Text">git add a.txt</text:p>
      <text:p text:style-name="First_20_paragraph">Si volvemos a ejecutar <text:span text:style-name="Source_20_Text">git status</text:span>, el estado habrá cambiado:</text:p>
      <text:p text:style-name="Preformatted_20_Text">En la rama master</text:p>
      <text:p text:style-name="Preformatted_20_Text">No hay commits todavía</text:p>
      <text:p text:style-name="Preformatted_20_Text">Cambios a ser confirmados:</text:p>
      <text:p text:style-name="Preformatted_20_Text"><text:s text:c="2"/>(usa "git rm --cached &lt;archivo&gt;..." para sacar del área de stage)</text:p>
      <text:p text:style-name="Preformatted_20_Text"><text:s text:c="4"/>nuevos archivos: a.txt</text:p>
      <text:h text:style-name="Heading_20_3" text:outline-level="3"><text:bookmark-start text:name="confirmar-los-cambios-commit"/>3. Confirmar los cambios (Commit)<text:bookmark-end text:name="confirmar-los-cambios-commit"/></text:h>
      <text:p text:style-name="First_20_paragraph">Ahora grabamos ese cambio permanentemente con un mensaje descriptivo:</text:p>
      <text:p text:style-name="Preformatted_20_Text">git commit -m "Primer commit"</text:p>
      <text:p text:style-name="First_20_paragraph">La salida nos confirmará el éxito:</text:p>
      <text:p text:style-name="Preformatted_20_Text">[master (commit-raíz) 9cf82fd] Primer commit</text:p>
      <text:p text:style-name="Preformatted_20_Text">1 file changed, 1 insertion(+)</text:p>
      <text:p text:style-name="Preformatted_20_Text">create mode 100644 a.txt</text:p>
      <text:p text:style-name="Horizontal_20_Line"/>
      <text:h text:style-name="Heading_20_2" text:outline-level="2"><text:bookmark-start text:name="consultando-la-historia-git-log"/>4. Consultando la Historia: <text:span text:style-name="Source_20_Text">git log</text:span><text:bookmark-end text:name="consultando-la-historia-git-log"/></text:h>
      <text:p text:style-name="First_20_paragraph">Una vez que has realizado varios <text:span text:style-name="Emphasis">commits</text:span>, querrás ver qué ha pasado. El comando <text:span text:style-name="Source_20_Text">git log</text:span> es tu ventana al pasado.</text:p>
      <text:p text:style-name="Preformatted_20_Text">git log</text:p>
      <text:p text:style-name="First_20_paragraph">La salida de este comando te mostrará información crucial para cada cambio: * <text:span text:style-name="Strong_20_Emphasis">Hash del commit</text:span>: Un identificador único (ej. <text:span text:style-name="Source_20_Text">9cf82fd...</text:span>) que sirve para referenciar ese cambio exacto. * <text:span text:style-name="Strong_20_Emphasis">Autor</text:span>: Quién realizó el cambio (Nombre y Email). * <text:span text:style-name="Strong_20_Emphasis">Fecha</text:span>: Cuándo se realizó la modificación. * <text:span text:style-name="Strong_20_Emphasis">Mensaje</text:span>: La descripción que escribiste para explicar el cambio.</text:p>
      <text:p text:style-name="Horizontal_20_Line"/>
      <text:h text:style-name="Heading_20_2" text:outline-level="2"><text:bookmark-start text:name="calidad-en-el-control-de-versiones-los-mensajes-de-commit"/>5. Calidad en el Control de Versiones: Los Mensajes de Commit<text:bookmark-end text:name="calidad-en-el-control-de-versiones-los-mensajes-de-commit"/></text:h>
      <text:p text:style-name="First_20_paragraph">Un historial de Git es tan útil como lo sean sus mensajes. Si tus mensajes son <text:span text:style-name="Source_20_Text">"cambio 1"</text:span>, <text:span text:style-name="Source_20_Text">"fix"</text:span> o <text:span text:style-name="Source_20_Text">"asdfgh"</text:span>, tu historial será inútil para cualquier persona (incluyéndote a ti mismo en el futuro).</text:p>
      <text:h text:style-name="Heading_20_3" text:outline-level="3"><text:bookmark-start text:name="la-anatomía-de-un-buen-mensaje"/>La Anatomía de un Buen Mensaje<text:bookmark-end text:name="la-anatomía-de-un-buen-mensaje"/></text:h>
      <text:p text:style-name="First_20_paragraph">Un mensaje profesional debe seguir estas reglas:</text:p>
      <text:list text:style-name="Numbering_20_1">
        <text:list-item>
          <text:p text:style-name="List_20_Number_20_Tight"><text:span text:style-name="Strong_20_Emphasis">El Asunto (Subject line)</text:span>:</text:p>
          <text:list text:style-name="List_20_1">
            <text:list-item>
              <text:p text:style-name="List_20_Bullet_20_Tight">Máximo 50 caracteres.</text:p>
            </text:list-item>
            <text:list-item>
              <text:p text:style-name="List_20_Bullet_20_Tight">Empieza con mayúscula.</text:p>
            </text:list-item>
            <text:list-item>
              <text:p text:style-name="List_20_Bullet_20_Tight"><text:span text:style-name="Strong_20_Emphasis">No</text:span> termina con punto final.</text:p>
            </text:list-item>
            <text:list-item>
              <text:p text:style-name="List_20_Bullet_20_Tight">Debe ser un resumen conciso de la acción.</text:p>
            </text:list-item>
          </text:list>
        </text:list-item>
        <text:list-item>
          <text:p text:style-name="List_20_Number_20_Tight"><text:span text:style-name="Strong_20_Emphasis">El Cuerpo (Body)</text:span>:</text:p>
          <text:list text:style-name="List_20_1">
            <text:list-item>
              <text:p text:style-name="List_20_Bullet_20_Tight">Se separa del asunto por una <text:span text:style-name="Strong_20_Emphasis">línea en blanco</text:span>.</text:p>
            </text:list-item>
            <text:list-item>
              <text:p text:style-name="List_20_Bullet_20_Tight">Explica el <text:span text:style-name="Strong_20_Emphasis">QUÉ</text:span> y el <text:span text:style-name="Strong_20_Emphasis">PORQUÉ</text:span>, no el <text:span text:style-name="Emphasis">cómo</text:span>. (El <text:span text:style-name="Emphasis">cómo</text:span> lo explica el código mismo; tú explicas la intención).</text:p>
            </text:list-item>
            <text:list-item>
              <text:p text:style-name="List_20_Bullet_20_Tight">Límite sugerido de 72 caracteres por línea para mantener la legibilidad.</text:p>
            </text:list-item>
          </text:list>
        </text:list-item>
      </text:list>
      <text:p text:style-name="First_20_paragraph"><text:span text:style-name="Strong_20_Emphasis">Ejemplo de un buen mensaje:</text:span></text:p>
      <text:p text:style-name="Preformatted_20_Text">Fix bug #2344</text:p>
      <text:p text:style-name="Preformatted_20_Text"/>
      <text:p text:style-name="Preformatted_20_Text">This fixes the incorrect translations reported in bug #2344 by</text:p>
      <text:p text:style-name="Preformatted_20_Text">updating the localization dictionary files.</text:p>
      <text:p text:style-name="Horizontal_20_Line"/>
      <text:h text:style-name="Heading_20_2" text:outline-level="2"><text:bookmark-start text:name="el-concepto-de-commits-atómicos"/>6. El Concepto de Commits Atómicos<text:bookmark-end text:name="el-concepto-de-commits-atómicos"/></text:h>
      <text:p text:style-name="First_20_paragraph">En el desarrollo profesional, se busca que cada <text:span text:style-name="Emphasis">commit</text:span> sea <text:span text:style-name="Strong_20_Emphasis">atómico</text:span>.</text:p>
      <text:p text:style-name="Text_20_body"><text:span text:style-name="Strong_20_Emphasis">¿Qué significa esto?</text:span> Que un <text:span text:style-name="Emphasis">commit</text:span> debe ser la unidad mínima de trabajo que tenga sentido por sí misma. Debe contener una única tarea o una única corrección.</text:p>
      <text:p text:style-name="Text_20_body"><text:span text:style-name="Strong_20_Emphasis">¿Por qué es importante?</text:span> * <text:span text:style-name="Strong_20_Emphasis">Revisiones más fáciles</text:span>: Es mucho más sencillo para un compañero revisar un cambio pequeño que uno gigante que mezcla cinco cosas distintas. * <text:span text:style-name="Strong_20_Emphasis">Reversiones seguras</text:span>: Si descubres que una funcionalidad nueva rompe el sistema, puedes revertir (<text:span text:style-name="Emphasis">revert</text:span>) ese único <text:span text:style-name="Emphasis">commit</text:span> atómico sin perder las otras correcciones que hiciste en el mismo periodo. * <text:span text:style-name="Strong_20_Emphasis">Historial limpio</text:span>: Facilita la búsqueda de errores (usando herramientas como <text:span text:style-name="Source_20_Text">git bisect</text:span>).</text:p>
      <text:p text:style-name="Horizontal_20_Line"/>
      <text:h text:style-name="Heading_20_2" text:outline-level="2"><text:bookmark-start text:name="actividades-de-aprendizaje"/>7. Actividades de Aprendizaje<text:bookmark-end text:name="actividades-de-aprendizaje"/></text:h>
      <text:h text:style-name="Heading_20_3" text:outline-level="3"><text:bookmark-start text:name="actividad-1-el-ciclo-completo"/>Actividad 1: El Ciclo Completo<text:bookmark-end text:name="actividad-1-el-ciclo-completo"/></text:h>
      <text:p text:style-name="First_20_paragraph"><text:span text:style-name="Strong_20_Emphasis">Objetivo</text:span>: Experimentar las tres zonas de Git en un entorno real.</text:p>
      <text:list text:style-name="Numbering_20_1">
        <text:list-item>
          <text:p text:style-name="List_20_Number_20_Tight">Crea una carpeta llamada <text:span text:style-name="Source_20_Text">laboratorio_git</text:span>.</text:p>
        </text:list-item>
        <text:list-item>
          <text:p text:style-name="List_20_Number_20_Tight">Entra en ella y ejecuta <text:span text:style-name="Source_20_Text">git init</text:span>.</text:p>
        </text:list-item>
        <text:list-item>
          <text:p text:style-name="List_20_Number_20_Tight">Crea un archivo llamado <text:span text:style-name="Source_20_Text">notas.txt</text:span> con cualquier texto.</text:p>
        </text:list-item>
        <text:list-item>
          <text:p text:style-name="List_20_Number_20_Tight">Usa <text:span text:style-name="Source_20_Text">git status</text:span> para comprobar que está en estado <text:span text:style-name="Emphasis">untracked</text:span>.</text:p>
        </text:list-item>
        <text:list-item>
          <text:p text:style-name="List_20_Number_20_Tight">Añade el archivo al área de preparación con <text:span text:style-name="Source_20_Text">git add</text:span>.</text:p>
        </text:list-item>
        <text:list-item>
          <text:p text:style-name="List_20_Number_20_Tight">Usa <text:span text:style-name="Source_20_Text">git status</text:span> para comprobar que está en estado <text:span text:style-name="Emphasis">staged</text:span>.</text:p>
        </text:list-item>
        <text:list-item>
          <text:p text:style-name="List_20_Number_20_Tight">Realiza tu primer <text:span text:style-name="Source_20_Text">git commit</text:span>.</text:p>
        </text:list-item>
        <text:list-item>
          <text:p text:style-name="List_20_Number_20_Tight">Crea un segundo archivo llamado <text:span text:style-name="Source_20_Text">tareas.txt</text:span>, modifícalo y vuelve a realizar el ciclo completo de <text:span text:style-name="Emphasis">add</text:span> y <text:span text:style-name="Emphasis">commit</text:span>.</text:p>
        </text:list-item>
        <text:list-item>
          <text:p text:style-name="List_20_Number_20_Tight">Finalmente, ejecuta <text:span text:style-name="Source_20_Text">git log</text:span> para ver tus dos hitos en la historia.</text:p>
        </text:list-item>
      </text:list>
      <text:h text:style-name="Heading_20_3" text:outline-level="3"><text:bookmark-start text:name="actividad-2-el-mensaje-perfecto"/>Actividad 2: El Mensaje Perfecto<text:bookmark-end text:name="actividad-2-el-mensaje-perfecto"/></text:h>
      <text:p text:style-name="First_20_paragraph"><text:span text:style-name="Strong_20_Emphasis">Objetivo</text:span>: Practicar la redacción de mensajes profesionales.</text:p>
      <text:p text:style-name="Text_20_body">Imagina que has estado trabajando en un programa y has detectado que el botón de “Enviar” no funciona cuando el usuario deja el campo de email vacío. Has corregido ese error.</text:p>
      <text:p text:style-name="Text_20_body">Escribe (en un papel o en un bloc de notas) cómo redactarías el mensaje de ese <text:span text:style-name="Emphasis">commit</text:span> siguiendo las reglas aprendidas: * Un asunto breve y claro. * Una línea en blanco. * Un cuerpo explicando la intención del cambio.</text:p>
      <text:p text:style-name="Horizontal_20_Line"/>
      <text:h text:style-name="Heading_20_2" text:outline-level="2"><text:bookmark-start text:name="soluciones-a-las-actividades"/>8. Soluciones a las Actividades<text:bookmark-end text:name="soluciones-a-las-actividades"/></text:h>
      <text:h text:style-name="Heading_20_3" text:outline-level="3"><text:bookmark-start text:name="solución-actividad-1"/>Solución Actividad 1<text:bookmark-end text:name="solución-actividad-1"/></text:h>
      <text:p text:style-name="First_20_paragraph">Los comandos correctos deberían ser:</text:p>
      <text:p text:style-name="Preformatted_20_Text">mkdir laboratorio_git</text:p>
      <text:p text:style-name="Preformatted_20_Text">cd laboratorio_git</text:p>
      <text:p text:style-name="Preformatted_20_Text">git init</text:p>
      <text:p text:style-name="Preformatted_20_Text">touch notas.txt</text:p>
      <text:p text:style-name="Preformatted_20_Text">git status</text:p>
      <text:p text:style-name="Preformatted_20_Text">git add notas.txt</text:p>
      <text:p text:style-name="Preformatted_20_Text">git status</text:p>
      <text:p text:style-name="Preformatted_20_Text">git commit -m "Crear archivo de notas inicial"</text:p>
      <text:p text:style-name="Preformatted_20_Text">touch tareas.txt</text:p>
      <text:p text:style-name="Preformatted_20_Text">echo "Hacer la tarea 1" &gt; tareas.txt</text:p>
      <text:p text:style-name="Preformatted_20_Text">git add tareas.txt</text:p>
      <text:p text:style-name="Preformatted_20_Text">git commit -m "Añadir lista de tareas"</text:p>
      <text:p text:style-name="Preformatted_20_Text">git log</text:p>
      <text:h text:style-name="Heading_20_3" text:outline-level="3"><text:bookmark-start text:name="solución-actividad-2-ejemplo-de-respuesta-correcta"/>Solución Actividad 2 (Ejemplo de respuesta correcta)<text:bookmark-end text:name="solución-actividad-2-ejemplo-de-respuesta-correcta"/></text:h>
      <text:p text:style-name="Preformatted_20_Text">Fix empty email validation error</text:p>
      <text:p text:style-name="Preformatted_20_Text"/>
      <text:p text:style-name="Preformatted_20_Text">Prevent the form from being submitted if the email field is blank. </text:p>
      <text:p text:style-name="Preformatted_20_Text">This addresses a crash reported during user registration.</text:p>
      <text:p text:style-name="First_20_paragraph"><text:span text:style-name="Emphasis">(Nota: El asunto es corto, sin punto final, y el cuerpo explica el porqué del cambio).</text:span></text:p>
      <text:p text:style-name="Horizontal_20_Line"/>
      <text:h text:style-name="Heading_20_2" text:outline-level="2"><text:bookmark-start text:name="materiales-para-profundizar"/>9. Materiales para Profundizar<text:bookmark-end text:name="materiales-para-profundizar"/></text:h>
      <text:list text:style-name="List_20_1">
        <text:list-item>
          <text:p text:style-name="List_20_Bullet_20_Tight"><text:span text:style-name="Strong_20_Emphasis">Blog de GitHub sobre mejores commits</text:span>: <text:a xlink:type="simple" xlink:href="https://github.blog/2022-06-30-write-better-commits-build-better-projects/" office:name=""><text:span text:style-name="Definition">Write better commits, build better projects</text:span></text:a></text:p>
        </text:list-item>
        <text:list-item>
          <text:p text:style-name="List_20_Bullet_20_Tight"><text:span text:style-name="Strong_20_Emphasis">Manual de Git (Sección de configuración)</text:span>: <text:a xlink:type="simple" xlink:href="https://git-scm.com/docs/git-config" office:name=""><text:span text:style-name="Definition">git-config documentation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F Mono" svg:font-family="'SF Mono'" style:font-pitch="variable"/>
    <style:font-face style:name="SF Mono1" svg:font-family="'SF Mono'" style:font-adornments="Normal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2" fo:font-family="Arial" style:font-style-name="Normal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fo:text-align="justify" style:justify-single-word="false" style:writing-mode="lr-tb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 style:master-page-name="">
      <loext:graphic-properties draw:fill="solid" draw:fill-color="#82005e"/>
      <style:paragraph-properties fo:margin-top="0.6cm" fo:margin-bottom="0.4cm" style:contextual-spacing="false" style:page-number="auto" fo:background-color="#82005e" fo:padding="0.199cm" fo:border="0.06pt solid #000000" style:shadow="none" style:writing-mode="lr-tb"/>
      <style:text-properties fo:text-transform="uppercase" fo:color="#ffffff" loext:opacity="100%" style:font-name="Arial1" fo:font-family="Arial" style:font-style-name="Negrita" style:font-family-generic="swiss" style:font-pitch="variable" fo:font-size="18pt" fo:font-weight="bold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Arial1" fo:font-family="Arial" style:font-style-name="Negrita" style:font-family-generic="swiss" style:font-pitch="variable" fo:font-weight="bold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fo:color="#82005e" loext:opacity="100%"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class="html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2a6099" loext:opacity="100%" style:font-name="SF Mono1" fo:font-family="'SF Mono'" style:font-style-name="Normal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 style:parent-style-name="Internet_20_link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2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8.182cm" fo:margin-left="-0.053cm" fo:margin-top="0cm" fo:margin-bottom="0cm" table:align="left" style:may-break-between-rows="false" style:writing-mode="lr-tb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3.986cm"/>
    </style:style>
    <style:style style:name="Tabla1.1" style:family="table-row">
      <style:table-row-properties style:min-row-height="0.951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457cm" fo:margin-left="-0.191cm" fo:margin-top="0cm" fo:margin-bottom="0cm" table:align="left" style:writing-mode="lr-tb"/>
    </style:style>
    <style:style style:name="Tabla2.A" style:family="table-column">
      <style:table-column-properties style:column-width="3.784cm"/>
    </style:style>
    <style:style style:name="Tabla2.B" style:family="table-column">
      <style:table-column-properties style:column-width="11.501cm"/>
    </style:style>
    <style:style style:name="Tabla2.C" style:family="table-column">
      <style:table-column-properties style:column-width="2.1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/>
    </style:style>
    <style:style style:name="MP1" style:family="paragraph" style:parent-style-name="Header">
      <style:text-properties fo:font-size="3pt" style:font-size-asian="3pt" style:font-size-complex="3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82005e" loext:opacity="100%" style:font-name="Arial Narrow" fo:font-weight="bold" officeooo:rsid="002f20c4" officeooo:paragraph-rsid="0072042a" style:font-weight-asian="bold" style:font-weight-complex="bold"/>
    </style:style>
    <style:style style:name="MP4" style:family="paragraph" style:parent-style-name="Standard">
      <style:paragraph-properties fo:text-align="center" style:justify-single-word="false"/>
      <style:text-properties fo:color="#3d4d59" loext:opacity="100%" style:font-name="Arial Narrow" fo:font-weight="bold" officeooo:rsid="00481002" officeooo:paragraph-rsid="0072042a" style:font-weight-asian="bold" style:font-weight-complex="bold"/>
    </style:style>
    <style:style style:name="MP5" style:family="paragraph" style:parent-style-name="Standard">
      <style:text-properties officeooo:paragraph-rsid="00578e4d"/>
    </style:style>
    <style:style style:name="MP6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  <style:text-properties style:font-name="Arial"/>
    </style:style>
    <style:style style:name="MT1" style:family="text">
      <style:text-properties officeooo:rsid="00481002"/>
    </style:style>
    <style:style style:name="MT2" style:family="text">
      <style:text-properties style:font-name="Arial" fo:font-size="8pt" officeooo:rsid="0017aa89" style:font-size-asian="8pt" style:font-size-complex="8pt"/>
    </style:style>
    <style:style style:name="MT3" style:family="text">
      <style:text-properties style:font-name="Arial" fo:font-size="8pt" style:font-size-asian="8pt" style:font-size-complex="8pt"/>
    </style:style>
    <style:style style:name="MT4" style:family="text">
      <style:text-properties style:font-name="Arial" fo:font-size="8pt" officeooo:rsid="00578e4d" style:font-size-asian="8pt" style:font-size-complex="8pt"/>
    </style:style>
    <style:style style:name="MT5" style:family="text">
      <style:text-properties style:font-name="SF Mono" fo:font-size="8pt" officeooo:rsid="00578e4d" style:font-size-asian="8pt" style:font-size-complex="8pt"/>
    </style:style>
    <style:style style:name="MT6" style:family="text">
      <style:text-properties style:font-name="SF Mono" fo:font-size="8pt" style:font-size-asian="8pt" style:font-size-complex="8pt"/>
    </style:style>
    <style:style style:name="MT7" style:family="text">
      <style:text-properties fo:font-size="8pt" style:font-size-asian="8pt" style:font-name-complex="Calibri" style:font-size-complex="8pt"/>
    </style:style>
    <style:style style:name="M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318cm" fo:margin-left="2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fo:background-color="transparent" style:dynamic-spacing="true" draw:fill="none" draw:fill-color="#729fcf"/>
      </style:header-style>
      <style:footer-style>
        <style:header-footer-properties fo:min-height="1.184cm" fo:margin-left="0cm" fo:margin-right="0cm" fo:margin-top="1.08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draw:frame draw:style-name="Mfr1" draw:name="Imagen1" text:anchor-type="as-char" svg:width="3.949cm" svg:height="1.499cm" draw:z-index="0"><draw:image xlink:href="Pictures/100012FE00001118000006B5118A7191D32BCF9E.svg" xlink:type="simple" xlink:show="embed" xlink:actuate="onLoad" draw:mime-type="image/svg+xml"/><draw:image xlink:href="Pictures/100000010000008C000000374CCE1123187A504C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>CFGS – <text:span text:style-name="MT1">DESARROLLO DE APLICACIONES MULTIPLATAFORMA</text:span></text:p>
              <text:p text:style-name="MP4">PROGRAMACIÓN – 2018/2019</text:p>
            </table:table-cell>
          </table:table-row>
        </table:table>
        <text:p text:style-name="MP1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Footer"><draw:frame draw:style-name="Mfr2" draw:name="Imagen3" text:anchor-type="as-char" svg:width="3.175cm" svg:height="1.111cm" draw:z-index="1"><draw:image xlink:href="Pictures/100027FC00000C6700000457C87E8BB6F128B3AA.svg" xlink:type="simple" xlink:show="embed" xlink:actuate="onLoad" draw:mime-type="image/svg+xml"/><draw:image xlink:href="Pictures/1000000100000065000000236E1FFF9B03ED9494.png" xlink:type="simple" xlink:show="embed" xlink:actuate="onLoad" draw:mime-type="image/png"/></draw:frame></text:p>
            </table:table-cell>
            <table:table-cell table:style-name="Tabla2.A1" office:value-type="string">
              <text:p text:style-name="MP5"><text:span text:style-name="MT2">Excepto si se especifica lo contrario, esta obra está bajo l</text:span><text:span text:style-name="MT3">icenci</text:span><text:span text:style-name="MT4">a </text:span><text:a xlink:type="simple" xlink:href="https://creativecommons.org/licenses/by/4.0/deed.es_ES" text:style-name="Internet_20_link" text:visited-style-name="Visited_20_Internet_20_Link"><text:span text:style-name="MT5">CC BY 4.0</text:span></text:a><text:span text:style-name="MT4">.</text:span></text:p>
              <text:p text:style-name="Standard"><text:span text:style-name="MT2">© </text:span><text:span text:style-name="MT2"><text:date style:data-style-name="N10104" text:date-value="2022-09-09T15:07:25.078266318">2022</text:date></text:span><text:span text:style-name="MT2"><text:s/>Departamento de Informática, </text:span><text:a xlink:type="simple" xlink:href="http://www.egibide.org/" text:style-name="Internet_20_link" text:visited-style-name="Visited_20_Internet_20_Link"><text:span text:style-name="MT6">Egibide</text:span></text:a><text:span text:style-name="MT2">. Algunos derechos reservados.</text:span></text:p>
            </table:table-cell>
            <table:table-cell table:style-name="Tabla2.A1" office:value-type="string">
              <text:p text:style-name="MP6"><text:span text:style-name="MT7">Página </text:span><text:span text:style-name="MT7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Descripción del reto</dc:title>
    <meta:editing-cycles>54</meta:editing-cycles>
    <meta:creation-date>2017-05-26T13:24:30.395479000</meta:creation-date>
    <meta:editing-duration>PT3H49M21S</meta:editing-duration>
    <meta:generator>LibreOffice/7.3.5.2$MacOSX_AARCH64 LibreOffice_project/184fe81b8c8c30d8b5082578aee2fed2ea847c01</meta:generator>
    <dc:date>2022-09-09T15:07:24.980877815</dc:date>
    <meta:document-statistic meta:table-count="3" meta:image-count="2" meta:object-count="0" meta:page-count="1" meta:paragraph-count="39" meta:word-count="227" meta:character-count="1341" meta:non-whitespace-character-count="1153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