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5000000239CE48809.png" manifest:media-type="image/png"/>
  <manifest:file-entry manifest:full-path="Pictures/100027FC00000C670000045707B6B994.svg" manifest:media-type="image/svg+xml"/>
  <manifest:file-entry manifest:full-path="Pictures/100000010000008C000000371E2AAA60.png" manifest:media-type="image/png"/>
  <manifest:file-entry manifest:full-path="Pictures/100012FE00001118000006B586973F00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SF Mono" svg:font-family="'SF Mono'" style:font-adornments="Normal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7.5cm" style:rel-width="100%" table:align="center" style:writing-mode="lr-tb"/>
    </style:style>
    <style:style style:name="Table1.A" style:family="table-column">
      <style:table-column-properties style:column-width="4.374cm" style:rel-column-width="16383*"/>
    </style:style>
    <style:style style:name="Table1.A1" style:family="table-cell">
      <style:table-cell-properties fo:padding="0cm" fo:border="none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ist_20_1"/>
    <style:style style:name="P4" style:family="paragraph" style:parent-style-name="Standard" style:list-style-name="L3"/>
    <style:style style:name="fr1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trabajo-en-equipo-el-flujo-de-pull-requests-forking-workflow"/>Trabajo en Equipo: El Flujo de Pull Requests<text:bookmark-end text:name="trabajo-en-equipo-el-flujo-de-pull-requests-forking-workflow"/></text:h>
      <text:p text:style-name="Standard">Cuando pasamos de trabajar solos a formar parte de un equipo de desarrollo, las reglas del juego cambian. Ya no basta con guardar tus cambios; ahora debes asegurarte de que tus cambios encajen perfectamente con los de tus compañeros y que no rompan el proyecto global. El método más profesional y seguro para lograr esto es el Forking Workflow (Flujo de trabajo mediante bifurcaciones).</text:p>
      <text:p text:style-name="Standard"/>
      <text:h text:style-name="Heading_20_2" text:outline-level="2"><text:bookmark-start text:name="introducción-colaboración-profesional"/>1. Introducción: Colaboración Profesional<text:bookmark-end text:name="introducción-colaboración-profesional"/></text:h>
      <text:p text:style-name="Standard">En un entorno de desarrollo profesional, existe un repositorio central que contiene la versión oficial y estable del software. Si todos los desarrolladores intentaran subir sus cambios directamente a ese repositorio, el riesgo de errores, conflictos y código roto sería altísimo.</text:p>
      <text:p text:style-name="Text_20_body">Para evitar este caos, utilizamos un proceso mediado por Pull Requests (Solicitudes de incorporación). Este proceso garantiza que cada cambio sea revisado, discutido y probado antes de ser integrado en el código principal.</text:p>
      <text:p text:style-name="Standard"/>
      <text:h text:style-name="Heading_20_2" text:outline-level="2"><text:bookmark-start text:name="el-modelo-de-trabajo-los-tres-niveles-de-repositorios"/>2. El Modelo de Trabajo: Los Tres Niveles de Repositorios<text:bookmark-end text:name="el-modelo-de-trabajo-los-tres-niveles-de-repositorios"/></text:h>
      <text:p text:style-name="Standard">En el flujo de trabajo por <text:span text:style-name="Emphasis">forking</text:span>, trabajamos con tres capas o niveles de repositorios: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Table_20_Heading">Nivel</text:p>
            </table:table-cell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Ubicación</text:p>
            </table:table-cell>
            <table:table-cell table:style-name="Table1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1.A1" office:value-type="string">
            <text:p text:style-name="Table_20_Contents">1. Upstream</text:p>
          </table:table-cell>
          <table:table-cell table:style-name="Table1.A1" office:value-type="string">
            <text:p text:style-name="Table_20_Contents">Repositorio Común (Organización)</text:p>
          </table:table-cell>
          <table:table-cell table:style-name="Table1.A1" office:value-type="string">
            <text:p text:style-name="Table_20_Contents">GitHub (Servidor Central)</text:p>
          </table:table-cell>
          <table:table-cell table:style-name="Table1.A1" office:value-type="string">
            <text:p text:style-name="Table_20_Contents">Es la “fuente de la verdad”. Contiene el código oficial y estable. Solo el gestor tiene permiso para escribir directamente en él.</text:p>
          </table:table-cell>
        </table:table-row>
        <table:table-row>
          <table:table-cell table:style-name="Table1.A1" office:value-type="string">
            <text:p text:style-name="Table_20_Contents">2. Origin</text:p>
          </table:table-cell>
          <table:table-cell table:style-name="Table1.A1" office:value-type="string">
            <text:p text:style-name="Table_20_Contents">Repositorio Personal (Fork)</text:p>
          </table:table-cell>
          <table:table-cell table:style-name="Table1.A1" office:value-type="string">
            <text:p text:style-name="Table_20_Contents">GitHub (Tu cuenta personal)</text:p>
          </table:table-cell>
          <table:table-cell table:style-name="Table1.A1" office:value-type="string">
            <text:p text:style-name="Table_20_Contents">Es una copia exacta del repositorio común que tú has creado en tu propia cuenta. Aquí tienes control total para subir tus cambios.</text:p>
          </table:table-cell>
        </table:table-row>
        <table:table-row>
          <table:table-cell table:style-name="Table1.A1" office:value-type="string">
            <text:p text:style-name="Table_20_Contents">3. Local</text:p>
          </table:table-cell>
          <table:table-cell table:style-name="Table1.A1" office:value-type="string">
            <text:p text:style-name="Table_20_Contents">Repositorio en tu Equipo</text:p>
          </table:table-cell>
          <table:table-cell table:style-name="Table1.A1" office:value-type="string">
            <text:p text:style-name="Table_20_Contents">Tu computadora</text:p>
          </table:table-cell>
          <table:table-cell table:style-name="Table1.A1" office:value-type="string">
            <text:p text:style-name="Table_20_Contents">Es donde realizas el trabajo real: editas archivos, haces commits y pruebas todo antes de subirlo.</text:p>
          </table:table-cell>
        </table:table-row>
      </table:table>
      <text:p text:style-name="Standard"/>
      <text:h text:style-name="Heading_20_2" text:outline-level="2"><text:bookmark-start text:name="roles-y-responsabilidades"/>3. Roles y Responsabilidades<text:bookmark-end text:name="roles-y-responsabilidades"/></text:h>
      <text:p text:style-name="Standard">Un equipo bien organizado necesita roles claros para que el flujo de trabajo sea fluido.</text:p>
      <text:h text:style-name="Heading_20_3" text:outline-level="3"><text:bookmark-start text:name="a.-el-gestor-del-proyecto-maintainer"/><text:soft-page-break/>A. El Gestor del Proyecto (Maintainer)<text:bookmark-end text:name="a.-el-gestor-del-proyecto-maintainer"/></text:h>
      <text:p text:style-name="Standard">Es la persona responsable de la salud y la estabilidad del repositorio común. Sus tareas incluyen: * Configuración inicial: Crear el repositorio en la organización, configurar el README.md, la licencia y el archivo .gitignore. * Control de calidad: Revisar cada Pull Request que llega de los desarrolladores. * Integración: Decidir si un cambio es apto para ser incorporado al proyecto mediante un merge. * Resolución de conflictos: Actuar cuando dos Pull Requests intentan modificar las mismas líneas y hay un conflicto de integración.</text:p>
      <text:h text:style-name="Heading_20_3" text:outline-level="3"><text:bookmark-start text:name="b.-el-desarrollador-contributor"/>B. El Desarrollador (Contributor)<text:bookmark-end text:name="b.-el-desarrollador-contributor"/></text:h>
      <text:p text:style-name="Standard">Es quien implementa las funcionalidades y corrige los errores. Sus tareas incluyen: * Bifurcación (Forking): Crear una copia del repositorio común en su propia cuenta de GitHub. * Preparación: Clonar su propio <text:span text:style-name="Emphasis">fork</text:span> en su computadora local para poder trabajar. * Desarrollo: Trabajar de forma aislada, realizando add y commit en su entorno local. * Sincronización: Subir sus cambios (push) a su repositorio personal en GitHub. * Propuesta de cambio: Enviar un Pull Request desde su repositorio personal hacia el repositorio común para solicitar la integración de su trabajo.</text:p>
      <text:p text:style-name="Standard"/>
      <text:h text:style-name="Heading_20_2" text:outline-level="2"><text:bookmark-start text:name="el-proceso-paso-a-paso-el-ciclo-de-vida-del-cambio"/>4. El Proceso Paso a Paso: El Ciclo de Vida del Cambio<text:bookmark-end text:name="el-proceso-paso-a-paso-el-ciclo-de-vida-del-cambio"/></text:h>
      <text:p text:style-name="Standard">Para que una idea pase de la mente de un desarrollador al código oficial del equipo, debe seguir este camino:</text:p>
      <text:list text:style-name="L1">
        <text:list-item>
          <text:p text:style-name="P1">Fork: El desarrollador hace un <text:span text:style-name="Emphasis">fork</text:span> del repositorio común en su cuenta de GitHub.</text:p>
        </text:list-item>
        <text:list-item>
          <text:p text:style-name="P1">Clone: El desarrollador clona su <text:span text:style-name="Emphasis">fork</text:span> a su máquina local.</text:p>
        </text:list-item>
        <text:list-item>
          <text:p text:style-name="P1">Work: El desarrollador crea una rama para su tarea, hace cambios y realiza commits locales.</text:p>
        </text:list-item>
        <text:list-item>
          <text:p text:style-name="P1">Push: El desarrollador sube su rama con los cambios a su <text:span text:style-name="Emphasis">fork</text:span> en GitHub (git push origin mi-rama).</text:p>
        </text:list-item>
        <text:list-item>
          <text:p text:style-name="P1">Pull Request (PR): El desarrollador entra en GitHub y abre un PR, pidiendo al gestor que incorpore los cambios de su rama hacia la rama principal del repositorio común.</text:p>
        </text:list-item>
        <text:list-item>
          <text:p text:style-name="P1">Review &amp; Merge: El gestor revisa el código, comenta si hay dudas y, si todo es correcto, realiza el merge en el repositorio común.</text:p>
        </text:list-item>
      </text:list>
      <text:p text:style-name="Standard"/>
      <text:h text:style-name="Heading_20_2" text:outline-level="2"><text:bookmark-start text:name="la-regla-de-oro-del-trabajo-en-equipo"/>5. La Regla de Oro del Trabajo en Equipo<text:bookmark-end text:name="la-regla-de-oro-del-trabajo-en-equipo"/></text:h>
      <text:p text:style-name="Quotations">“Nunca subas cambios directamente al repositorio común (Upstream).”</text:p>
      <text:p text:style-name="Standard">Esta regla es la base de la estabilidad. Al trabajar siempre a través de <text:span text:style-name="Emphasis">forks</text:span> y <text:span text:style-name="Emphasis">Pull Requests</text:span>: * El repositorio principal se mantiene siempre limpio y funcional. * Se fomenta la comunicación: los cambios son revisados por otros antes de ser definitivos. * Se evita el desorden: no hay riesgo de que un error accidental de un desarrollador bloquee el trabajo de todo el equipo.</text:p>
      <text:p text:style-name="Standard"/>
      <text:h text:style-name="Heading_20_2" text:outline-level="2"><text:bookmark-start text:name="actividades-de-aprendizaje"/>6. Actividades de Aprendizaje<text:bookmark-end text:name="actividades-de-aprendizaje"/></text:h>
      <text:h text:style-name="Heading_20_3" text:outline-level="3"><text:bookmark-start text:name="actividad-1-identificación-de-roles-y-flujo"/>Actividad 1: Identificación de Roles y Flujo<text:bookmark-end text:name="actividad-1-identificación-de-roles-y-flujo"/></text:h>
      <text:p text:style-name="Standard">Objetivo: Comprender la interacción entre los diferentes componentes del sistema.</text:p>
      <text:p text:style-name="Text_20_body">Analiza el siguiente caso y responde: “<text:span text:style-name="Emphasis">Ana es la responsable de que el proyecto de la empresa funcione correctamente. Marc es un programador que ha encontrado un error en el </text:span><text:soft-page-break/><text:span text:style-name="Emphasis">sistema. Marc crea una copia del proyecto en su cuenta de GitHub, descarga esa copia a su portátil, arregla el error y luego le pide a Ana que revise su arreglo para que este pase al proyecto principal.</text:span>”</text:p>
      <text:list text:style-name="L2">
        <text:list-item>
          <text:p text:style-name="P2">¿Quién actúa como Gestor del Proyecto?</text:p>
        </text:list-item>
        <text:list-item>
          <text:p text:style-name="P2">¿Qué acción representa el Fork en este caso?</text:p>
        </text:list-item>
        <text:list-item>
          <text:p text:style-name="P2">¿Cómo se llama la solicitud que Marc le envía a Ana para que su arreglo sea aceptado?</text:p>
        </text:list-item>
      </text:list>
      <text:h text:style-name="Heading_20_3" text:outline-level="3"><text:bookmark-start text:name="actividad-2-ordenando-el-proceso"/>Actividad 2: Ordenando el Proceso<text:bookmark-end text:name="actividad-2-ordenando-el-proceso"/></text:h>
      <text:p text:style-name="Standard">Objetivo: Memorizar la secuencia lógica del flujo de trabajo.</text:p>
      <text:p text:style-name="Text_20_body">Ordena los siguientes pasos del 1 al 6 para describir el ciclo de vida completo de un cambio en este modelo:</text:p>
      <text:list text:style-name="List_20_1">
        <text:list-item>
          <text:p text:style-name="P3">( ) El desarrollador hace push de sus cambios a su propio repositorio en GitHub.</text:p>
        </text:list-item>
        <text:list-item>
          <text:p text:style-name="P3">( ) El gestor revisa el Pull Request y realiza el merge.</text:p>
        </text:list-item>
        <text:list-item>
          <text:p text:style-name="P3">( ) El desarrollador hace un fork del repositorio de la organización.</text:p>
        </text:list-item>
        <text:list-item>
          <text:p text:style-name="P3">( ) El desarrollador abre un Pull Request desde su fork hacia el repositorio común.</text:p>
        </text:list-item>
        <text:list-item>
          <text:p text:style-name="P3">( ) El desarrollador clona su fork personal a su máquina local.</text:p>
        </text:list-item>
        <text:list-item>
          <text:p text:style-name="P3">( ) El desarrollador realiza cambios y hace commit en su ordenador.</text:p>
        </text:list-item>
      </text:list>
      <text:p text:style-name="Standard"/>
      <text:h text:style-name="Heading_20_2" text:outline-level="2"><text:bookmark-start text:name="soluciones-a-las-actividades"/>7. Soluciones a las Actividades<text:bookmark-end text:name="soluciones-a-las-actividades"/></text:h>
      <text:h text:style-name="Heading_20_3" text:outline-level="3"><text:bookmark-start text:name="solución-actividad-1"/>Solución Actividad 1<text:bookmark-end text:name="solución-actividad-1"/></text:h>
      <text:list text:style-name="L3">
        <text:list-item>
          <text:p text:style-name="P4">Gestor del Proyecto: Ana.</text:p>
        </text:list-item>
        <text:list-item>
          <text:p text:style-name="P4">Fork: El momento en que Marc crea una copia del proyecto en su propia cuenta de GitHub.</text:p>
        </text:list-item>
        <text:list-item>
          <text:p text:style-name="P4">Pull Request: La solicitud que Marc envía para integrar su arreglo.</text:p>
        </text:list-item>
      </text:list>
      <text:h text:style-name="Heading_20_3" text:outline-level="3"><text:bookmark-start text:name="solución-actividad-2"/>Solución Actividad 2<text:bookmark-end text:name="solución-actividad-2"/></text:h>
      <text:p text:style-name="Standard">El orden correcto es: 1. El desarrollador hace un fork del repositorio de la organización. 2. El desarrollador clona su fork personal a su máquina local. 3. El desarrollador realiza cambios y hace commit en su ordenador. 4. El desarrollador hace push de sus cambios a su propio repositorio en GitHub. 5. El desarrollador abre un Pull Request desde su fork hacia el repositorio común. 6. El gestor revisa el Pull Request y realiza el merge.</text:p>
      <text:p text:style-name="Standard"/>
      <text:h text:style-name="Heading_20_2" text:outline-level="2"><text:bookmark-start text:name="materiales-para-profundizar"/>8. Materiales para Profundizar<text:bookmark-end text:name="materiales-para-profundizar"/></text:h>
      <text:list text:style-name="List_20_1">
        <text:list-item>
          <text:p text:style-name="P3">Documentación de GitHub sobre Pull Requests: Cómo crear y gestionar una solicitud de integración. <text:a xlink:type="simple" xlink:href="https://docs.github.com/es/pull-requests" text:style-name="Internet_20_link" text:visited-style-name="Visited_20_Internet_20_Link"><text:span text:style-name="Definition">https://docs.github.com/es/pull-requests</text:span></text:a></text:p>
        </text:list-item>
        <text:list-item>
          <text:p text:style-name="P3">Guía de Git sobre Forking: Conceptos avanzados de gestión de repositorios remotos. <text:a xlink:type="simple" xlink:href="https://git-scm.com/book/en/v2/Distributed-Git---Forking" text:style-name="Internet_20_link" text:visited-style-name="Visited_20_Internet_20_Link"><text:span text:style-name="Definition">https://git-scm.com/book/en/v2/Distributed-Git—Forking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SF Mono" svg:font-family="'SF Mono'" style:font-adornments="Normal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left" style:justify-single-word="false" fo:orphans="2" fo:widows="2" style:writing-mode="lr-tb"/>
      <style:text-properties style:font-name="Arial2" fo:font-family="Arial" style:font-style-name="Normal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fo:text-align="justify" style:justify-single-word="false" style:writing-mode="lr-tb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chapter" style:master-page-name="">
      <loext:graphic-properties draw:fill="solid" draw:fill-color="#82005e"/>
      <style:paragraph-properties fo:margin-top="0.6cm" fo:margin-bottom="0.4cm" style:contextual-spacing="false" style:page-number="auto" fo:background-color="#82005e" fo:padding="0.199cm" fo:border="0.06pt solid #000000" style:shadow="none" style:writing-mode="lr-tb"/>
      <style:text-properties fo:text-transform="uppercase" fo:color="#ffffff" loext:opacity="100%" style:font-name="Arial1" fo:font-family="Arial" style:font-style-name="Negrita" style:font-family-generic="swiss" style:font-pitch="variable" fo:font-size="18pt" fo:font-weight="bold"/>
    </style:style>
    <style:style style:name="Heading_20_2" style:display-name="Heading 2" style:family="paragraph" style:parent-style-name="Heading" style:class="chapter">
      <style:paragraph-properties style:writing-mode="lr-tb"/>
      <style:text-properties style:font-name="Arial1" fo:font-family="Arial" style:font-style-name="Negrita" style:font-family-generic="swiss" style:font-pitch="variable" fo:font-weight="bold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style:writing-mode="lr-tb"/>
      <style:text-properties fo:color="#82005e" loext:opacity="100%"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2a6099" loext:opacity="100%" style:font-name="SF Mono" fo:font-family="'SF Mono'" style:font-style-name="Normal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 style:parent-style-name="Internet_20_link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2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 number:title="Definido por el usuario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182cm" fo:margin-left="-0.053cm" fo:margin-top="0cm" fo:margin-bottom="0cm" table:align="left" style:may-break-between-rows="false" style:writing-mode="lr-tb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3.986cm"/>
    </style:style>
    <style:style style:name="Tabla1.1" style:family="table-row">
      <style:table-row-properties style:min-row-height="0.951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457cm" fo:margin-left="-0.191cm" fo:margin-top="0cm" fo:margin-bottom="0cm" table:align="left" style:writing-mode="lr-tb"/>
    </style:style>
    <style:style style:name="Tabla2.A" style:family="table-column">
      <style:table-column-properties style:column-width="3.784cm"/>
    </style:style>
    <style:style style:name="Tabla2.B" style:family="table-column">
      <style:table-column-properties style:column-width="11.501cm"/>
    </style:style>
    <style:style style:name="Tabla2.C" style:family="table-column">
      <style:table-column-properties style:column-width="2.1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82005e" loext:opacity="100%" style:font-name="Arial Narrow" fo:font-weight="bold" officeooo:rsid="002f20c4" officeooo:paragraph-rsid="0072042a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3d4d59" loext:opacity="100%" style:font-name="Arial Narrow" fo:font-weight="bold" officeooo:rsid="00481002" officeooo:paragraph-rsid="0072042a" style:font-weight-asian="bold" style:font-weight-complex="bold"/>
    </style:style>
    <style:style style:name="MP4" style:family="paragraph" style:parent-style-name="Header">
      <style:text-properties fo:font-size="3pt" style:font-size-asian="3pt" style:font-size-complex="3pt"/>
    </style:style>
    <style:style style:name="MP5" style:family="paragraph" style:parent-style-name="Standard">
      <style:text-properties officeooo:paragraph-rsid="00578e4d"/>
    </style:style>
    <style:style style:name="MP6" style:family="paragraph" style:parent-style-name="Footer">
      <style:paragraph-properties fo:text-align="right" style:justify-single-word="false">
        <style:tab-stops>
          <style:tab-stop style:position="15cm" style:type="right"/>
        </style:tab-stops>
      </style:paragraph-properties>
      <style:text-properties style:font-name="Arial"/>
    </style:style>
    <style:style style:name="MT1" style:family="text">
      <style:text-properties officeooo:rsid="00481002"/>
    </style:style>
    <style:style style:name="MT2" style:family="text">
      <style:text-properties style:font-name="Arial" fo:font-size="8pt" officeooo:rsid="0017aa89" style:font-size-asian="8pt" style:font-size-complex="8pt"/>
    </style:style>
    <style:style style:name="MT3" style:family="text">
      <style:text-properties style:font-name="Arial" fo:font-size="8pt" style:font-size-asian="8pt" style:font-size-complex="8pt"/>
    </style:style>
    <style:style style:name="MT4" style:family="text">
      <style:text-properties style:font-name="Arial" fo:font-size="8pt" officeooo:rsid="00578e4d" style:font-size-asian="8pt" style:font-size-complex="8pt"/>
    </style:style>
    <style:style style:name="MT5" style:family="text">
      <style:text-properties fo:font-family="'SF Mono'" style:font-pitch="variable" fo:font-size="8pt" officeooo:rsid="00578e4d" style:font-size-asian="8pt" style:font-size-complex="8pt"/>
    </style:style>
    <style:style style:name="MT6" style:family="text">
      <style:text-properties fo:font-family="'SF Mono'" style:font-pitch="variable" fo:font-size="8pt" style:font-size-asian="8pt" style:font-size-complex="8pt"/>
    </style:style>
    <style:style style:name="MT7" style:family="text">
      <style:text-properties fo:font-size="8pt" style:font-size-asian="8pt" style:font-family-complex="Calibri" style:font-family-generic-complex="system" style:font-pitch-complex="variable" style:font-size-complex="8pt"/>
    </style:style>
    <style:style style:name="M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318cm" fo:margin-left="2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fo:background-color="transparent" style:dynamic-spacing="true" draw:fill="none" draw:fill-color="#729fcf"/>
      </style:header-style>
      <style:footer-style>
        <style:header-footer-properties fo:min-height="1.184cm" fo:margin-left="0cm" fo:margin-right="0cm" fo:margin-top="1.08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1" text:anchor-type="as-char" svg:width="3.949cm" svg:height="1.499cm" draw:z-index="2"><draw:image xlink:href="Pictures/100012FE00001118000006B586973F00.svg" xlink:type="simple" xlink:show="embed" xlink:actuate="onLoad" draw:mime-type="image/svg+xml"/><draw:image xlink:href="Pictures/100000010000008C000000371E2AAA60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>CFGS – <text:span text:style-name="MT1">DESARROLLO DE APLICACIONES MULTIPLATAFORMA</text:span></text:p>
              <text:p text:style-name="MP3">PROGRAMACIÓN – 2018/2019</text:p>
            </table:table-cell>
          </table:table-row>
        </table:table>
        <text:p text:style-name="MP4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Footer"><draw:frame draw:style-name="Mfr2" draw:name="Imagen3" text:anchor-type="as-char" svg:width="3.175cm" svg:height="1.111cm" draw:z-index="5"><draw:image xlink:href="Pictures/100027FC00000C670000045707B6B994.svg" xlink:type="simple" xlink:show="embed" xlink:actuate="onLoad" draw:mime-type="image/svg+xml"/><draw:image xlink:href="Pictures/1000000100000065000000239CE4880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5"><text:span text:style-name="MT2">Excepto si se especifica lo contrario, esta obra está bajo l</text:span><text:span text:style-name="MT3">icenci</text:span><text:span text:style-name="MT4">a </text:span><text:a xlink:type="simple" xlink:href="https://creativecommons.org/licenses/by/4.0/deed.es_ES" text:style-name="Internet_20_link" text:visited-style-name="Visited_20_Internet_20_Link"><text:span text:style-name="MT5">CC BY 4.0</text:span></text:a><text:span text:style-name="MT4">.</text:span></text:p>
              <text:p text:style-name="Standard"><text:span text:style-name="MT2">© </text:span><text:span text:style-name="MT2"><text:date style:data-style-name="N10111" text:date-value="2026-06-18T16:28:16.577297290">2026</text:date></text:span><text:span text:style-name="MT2"><text:s/>Departamento de Informática, </text:span><text:a xlink:type="simple" xlink:href="http://www.egibide.org/" text:style-name="Internet_20_link" text:visited-style-name="Visited_20_Internet_20_Link"><text:span text:style-name="MT6">Egibide</text:span></text:a><text:span text:style-name="MT2">. Algunos derechos reservados.</text:span></text:p>
            </table:table-cell>
            <table:table-cell table:style-name="Tabla2.A1" office:value-type="string">
              <text:p text:style-name="MP6"><text:span text:style-name="MT7">Página </text:span><text:span text:style-name="MT7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scripción del reto</dc:title>
    <meta:editing-cycles>55</meta:editing-cycles>
    <meta:creation-date>2017-05-26T13:24:30.395479000</meta:creation-date>
    <meta:editing-duration>PT3H49M28S</meta:editing-duration>
    <meta:generator>LibreOffice/26.2.4.2$MacOSX_AARCH64 LibreOffice_project/0229ac93fcf0d7cbc6376066c6f35021cef002dc</meta:generator>
    <dc:date>2026-06-18T16:28:16.550643000</dc:date>
    <meta:document-statistic meta:table-count="3" meta:image-count="2" meta:object-count="0" meta:page-count="3" meta:paragraph-count="73" meta:word-count="1128" meta:character-count="6810" meta:non-whitespace-character-count="5772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