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065000000239CE48809.png" manifest:media-type="image/png"/>
  <manifest:file-entry manifest:full-path="Pictures/100027FC00000C670000045707B6B994.svg" manifest:media-type="image/svg+xml"/>
  <manifest:file-entry manifest:full-path="Pictures/100000010000008C000000371E2AAA60.png" manifest:media-type="image/png"/>
  <manifest:file-entry manifest:full-path="Pictures/100012FE00001118000006B586973F00.svg" manifest:media-type="image/svg+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Narrow" svg:font-family="'Arial Narrow'" style:font-family-generic="roman" style:font-pitch="variable"/>
    <style:font-face style:name="Arial Unicode MS" svg:font-family="'Arial Unicode MS'" style:font-family-generic="system"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Courier New" svg:font-family="'Courier New'" style:font-family-generic="modern"/>
    <style:font-face style:name="Courier New1" svg:font-family="'Courier New'" style:font-family-generic="system" style:font-pitch="variable"/>
    <style:font-face style:name="Liberation Sans" svg:font-family="'Liberation Sans'" style:font-family-generic="swiss" style:font-pitch="variable"/>
    <style:font-face style:name="SF Mono" svg:font-family="'SF Mono'" style:font-adornments="Normal" style:font-pitch="variable"/>
    <style:font-face style:name="StarSymbol" svg:font-family="StarSymbol" style:font-charset="x-symbol"/>
    <style:font-face style:name="Symbol" svg:font-family="Symbo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pitch="variable" style:font-charset="x-symbol"/>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ist_20_1"/>
    <style:style style:name="fr1" style:family="graphic" style:parent-style-name="Graphics">
      <style:graphic-properties fo:margin-top="0.101cm" fo:margin-bottom="0.101cm" style:protect="content size position"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protect="content size position"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trabajo-con-ramas-en-git-branching"/>Trabajo con Ramas en Git<text:bookmark-end text:name="trabajo-con-ramas-en-git-branching"/></text:h>
      <text:p text:style-name="Standard">En el desarrollo de software profesional, nunca se trabaja directamente sobre la versión estable del código. Si intentas añadir una funcionalidad nueva y algo sale mal, romperás el proyecto para todos los demás. Para evitar esto, Git utiliza un concepto revolucionario: las ramas (<text:span text:style-name="Emphasis">branches</text:span>).</text:p>
      <text:p text:style-name="Standard"/>
      <text:h text:style-name="Heading_20_2" text:outline-level="2"><text:bookmark-start text:name="introducción-por-qué-necesitamos-ramas"/>1. Introducción: ¿Por qué necesitamos ramas?<text:bookmark-end text:name="introducción-por-qué-necesitamos-ramas"/></text:h>
      <text:p text:style-name="Standard">Imagina que estás escribiendo un libro. La versión que ya tienes impresa es tu “rama principal”. De repente, quieres probar un final alternativo para el capítulo 3. En lugar de borrar o modificar lo que ya tienes, sacas una fotocopia del capítulo 3, haces tus experimentos en esa copia y, si te gusta el resultado, lo integras en el libro original. Si no te gusta, simplemente tiras la fotocopia y tu libro original sigue intacto.</text:p>
      <text:p text:style-name="Text_20_body">Las ramas permiten: * Aislamiento: Trabajar en una nueva funcionalidad sin afectar la estabilidad del proyecto principal. * Paralelismo: Diferentes desarrolladores pueden trabajar en diferentes tareas (una rama para el login, otra para el carrito de compras) al mismo tiempo. * Seguridad: Probar cambios arriesgados en un entorno controlado antes de su integración definitiva.</text:p>
      <text:p text:style-name="Standard"/>
      <text:h text:style-name="Heading_20_2" text:outline-level="2"><text:bookmark-start text:name="conceptos-fundamentales-de-ramas"/>2. Conceptos Fundamentales de Ramas<text:bookmark-end text:name="conceptos-fundamentales-de-ramas"/></text:h>
      <text:p text:style-name="Standard">En Git, una rama no es una copia pesada de todos tus archivos; es simplemente un puntero móvil que apunta a uno de los <text:span text:style-name="Emphasis">commits</text:span> de tu historia.</text:p>
      <text:p text:style-name="Text_20_body">Cuando creas una nueva rama, Git crea un nuevo puntero que comienza en el mismo <text:span text:style-name="Emphasis">commit</text:span> donde te encuentras actualmente. A medida que haces nuevos <text:span text:style-name="Emphasis">commits</text:span> en esa rama, el puntero de la nueva rama se mueve hacia adelante, mientras que la rama original permanece donde estaba.</text:p>
      <text:p text:style-name="Text_20_body">La rama por defecto de un repositorio suele llamarse master o main. Es la línea de tiempo principal de tu proyecto.</text:p>
      <text:p text:style-name="Standard"/>
      <text:h text:style-name="Heading_20_2" text:outline-level="2"><text:bookmark-start text:name="comandos-para-la-gestión-de-ramas"/>3. Comandos para la Gestión de Ramas<text:bookmark-end text:name="comandos-para-la-gestión-de-ramas"/></text:h>
      <text:p text:style-name="Standard">Para movernos por el mundo de las ramas, utilizaremos los siguientes comandos esenciales:</text:p>
      <text:h text:style-name="Heading_20_3" text:outline-level="3"><text:bookmark-start text:name="crear-una-rama"/>Crear una rama<text:bookmark-end text:name="crear-una-rama"/></text:h>
      <text:p text:style-name="Standard">Para crear una nueva rama sin moverte de la actual:</text:p>
      <text:p text:style-name="Standard">git branch nombre-de-la-rama</text:p>
      <text:h text:style-name="Heading_20_3" text:outline-level="3"><text:bookmark-start text:name="comprobar-la-rama-actual"/>Comprobar la rama actual<text:bookmark-end text:name="comprobar-la-rama-actual"/></text:h>
      <text:p text:style-name="Standard">Para saber en qué “línea de tiempo” te encuentras:</text:p>
      <text:p text:style-name="Standard">git status</text:p>
      <text:h text:style-name="Heading_20_3" text:outline-level="3"><text:bookmark-start text:name="cambiar-de-rama-switch"/><text:soft-page-break/>Cambiar de rama (Switch)<text:bookmark-end text:name="cambiar-de-rama-switch"/></text:h>
      <text:p text:style-name="Standard">Para moverte a una rama que ya existe:</text:p>
      <text:p text:style-name="Standard">git switch nombre-de-la-rama</text:p>
      <text:p text:style-name="Standard"><text:span text:style-name="Emphasis">(Nota: En versiones antiguas de Git se utilizaba </text:span>git checkout<text:span text:style-name="Emphasis">, pero </text:span>git switch<text:span text:style-name="Emphasis"> es el comando moderno y más claro para esta tarea).</text:span></text:p>
      <text:p text:style-name="Standard"/>
      <text:h text:style-name="Heading_20_2" text:outline-level="2"><text:bookmark-start text:name="fusionando-cambios-merging"/>4. Fusionando Cambios (Merging)<text:bookmark-end text:name="fusionando-cambios-merging"/></text:h>
      <text:p text:style-name="Standard">Una vez que has terminado tu trabajo en una rama secundaria y quieres integrarlo en la rama principal, debes realizar una fusión (<text:span text:style-name="Emphasis">merge</text:span>).</text:p>
      <text:p text:style-name="Text_20_body">El proceso es siempre el siguiente: 1. Te sitúas en la rama que recibirá los cambios (normalmente la principal). 2. Ejecutas el comando de fusión indicando la rama que aporta los cambios.</text:p>
      <text:p text:style-name="Standard"># 1. Volver a la rama principal</text:p>
      <text:p text:style-name="Standard">git switch main</text:p>
      <text:p text:style-name="Standard"/>
      <text:p text:style-name="Standard"># 2. Fusionar los cambios de la rama secundaria</text:p>
      <text:p text:style-name="Standard">git merge mi-nueva-funcionalidad</text:p>
      <text:p text:style-name="Standard"/>
      <text:h text:style-name="Heading_20_2" text:outline-level="2"><text:bookmark-start text:name="tipos-de-fusión-merging"/>5. Tipos de Fusión (Merging)<text:bookmark-end text:name="tipos-de-fusión-merging"/></text:h>
      <text:p text:style-name="Standard">No todas las fusiones son iguales. Dependiendo de cómo se haya movido la historia, Git elegirá uno de estos tres caminos:</text:p>
      <text:h text:style-name="Heading_20_3" text:outline-level="3"><text:bookmark-start text:name="a.-avance-rápido-fast-forward"/>A. Avance Rápido (<text:span text:style-name="Emphasis">Fast-Forward</text:span>)<text:bookmark-end text:name="a.-avance-rápido-fast-forward"/></text:h>
      <text:p text:style-name="Standard">Ocurre cuando la rama principal no ha recibido ningún nuevo commit desde que creaste la rama secundaria. Git simplemente “mueve el puntero” de la rama principal hacia adelante hasta alcanzar el último commit de la secundaria. Es una fusión limpia y sin complicaciones.</text:p>
      <text:h text:style-name="Heading_20_3" text:outline-level="3"><text:bookmark-start text:name="b.-fusión-automática-three-way-merge"/>B. Fusión Automática (<text:span text:style-name="Emphasis">Three-Way Merge</text:span>)<text:bookmark-end text:name="b.-fusión-automática-three-way-merge"/></text:h>
      <text:p text:style-name="Standard">Ocurre cuando la rama principal sí ha avanzado (tiene nuevos commits) mientras tú trabajabas en tu rama secundaria. Como ambas líneas de tiempo han divergido, Git busca un antepasado común y crea un nuevo commit especial llamado <text:span text:style-name="Emphasis">merge commit</text:span> que une ambas historias.</text:p>
      <text:h text:style-name="Heading_20_3" text:outline-level="3"><text:bookmark-start text:name="c.-conflicto-de-fusión-merge-conflict"/>C. Conflicto de Fusión (<text:span text:style-name="Emphasis">Merge Conflict</text:span>)<text:bookmark-end text:name="c.-conflicto-de-fusión-merge-conflict"/></text:h>
      <text:p text:style-name="Standard">Es el escenario más temido, pero es algo natural. Ocurre cuando intentas fusionar dos ramas que han modificado las mismas líneas del mismo archivo de forma distinta. Git no sabe qué versión es la correcta y se detiene para pedirte ayuda.</text:p>
      <text:p text:style-name="Standard"/>
      <text:h text:style-name="Heading_20_2" text:outline-level="2"><text:bookmark-start text:name="cómo-resolver-conflictos-de-fusión"/>6. Cómo Resolver Conflictos de Fusión<text:bookmark-end text:name="cómo-resolver-conflictos-de-fusión"/></text:h>
      <text:p text:style-name="Standard">Cuando ocurre un conflicto, Git marca los archivos problemáticos y detiene la fusión. Debes intervenir manualmente siguiendo estos pasos:</text:p>
      <text:list text:style-name="L1">
        <text:list-item>
          <text:p text:style-name="P1">Identificar el conflicto: Abre el archivo señalado. Verás marcas especiales que Git ha insertado:</text:p>
          <text:p text:style-name="P1">&lt;&lt;&lt;&lt;&lt;&lt;&lt; HEAD</text:p>
          <text:p text:style-name="P1"><text:soft-page-break/>Contenido de la rama actual (donde estás parado)</text:p>
          <text:p text:style-name="P1">=======</text:p>
          <text:p text:style-name="P1">Contenido de la rama que quieres fusionar</text:p>
          <text:p text:style-name="P1">&gt;&gt;&gt;&gt;&gt;&gt;&gt; nombre-de-la-rama</text:p>
        </text:list-item>
        <text:list-item>
          <text:p text:style-name="P1">Editar el archivo: Decide qué contenido quieres mantener. Puedes quedarte con uno de los dos, con ambos, o escribir una versión totalmente nueva que combine lo mejor de ambos. Debes borrar las marcas (&lt;&lt;&lt;&lt;&lt;&lt;&lt;, =======, &gt;&gt;&gt;&gt;&gt;&gt;&gt;).</text:p>
        </text:list-item>
        <text:list-item>
          <text:p text:style-name="P1">Marcar como resuelto: Una vez editado y guardado el archivo, dile a Git que ya has solucionado el problema:</text:p>
          <text:p text:style-name="P1">git add nombre-del-archivo-en-conflicto</text:p>
        </text:list-item>
        <text:list-item>
          <text:p text:style-name="P1">Finalizar la fusión: Completa el proceso creando el commit de la fusión:</text:p>
          <text:p text:style-name="P1">git commit</text:p>
        </text:list-item>
      </text:list>
      <text:p text:style-name="Standard"/>
      <text:h text:style-name="Heading_20_2" text:outline-level="2"><text:bookmark-start text:name="actividades-de-aprendizaje"/>7. Actividades de Aprendizaje<text:bookmark-end text:name="actividades-de-aprendizaje"/></text:h>
      <text:h text:style-name="Heading_20_3" text:outline-level="3"><text:bookmark-start text:name="actividad-1-el-viaje-entre-ramas"/>Actividad 1: El Viaje entre Ramas<text:bookmark-end text:name="actividad-1-el-viaje-entre-ramas"/></text:h>
      <text:p text:style-name="Standard">Objetivo: Practicar la creación, cambio y verificación de ramas.</text:p>
      <text:list text:style-name="L2">
        <text:list-item>
          <text:p text:style-name="P2">Crea un nuevo repositorio con git init.</text:p>
        </text:list-item>
        <text:list-item>
          <text:p text:style-name="P2">Crea un archivo llamado base.txt y hazle un <text:span text:style-name="Emphasis">commit</text:span>.</text:p>
        </text:list-item>
        <text:list-item>
          <text:p text:style-name="P2">Crea una nueva rama llamada desarrollo.</text:p>
        </text:list-item>
        <text:list-item>
          <text:p text:style-name="P2">Cambia a la rama desarrollo usando git switch.</text:p>
        </text:list-item>
        <text:list-item>
          <text:p text:style-name="P2">Crea un archivo llamado prueba.txt y hazle un <text:span text:style-name="Emphasis">commit</text:span>.</text:p>
        </text:list-item>
        <text:list-item>
          <text:p text:style-name="P2">Vuelve a la rama principal (main o master) y comprueba con ls si el archivo prueba.txt sigue ahí o ha desaparecido (¡debería haber desaparecido!).</text:p>
        </text:list-item>
      </text:list>
      <text:h text:style-name="Heading_20_3" text:outline-level="3"><text:bookmark-start text:name="actividad-2-el-desafío-del-conflicto"/>Actividad 2: El Desafío del Conflicto<text:bookmark-end text:name="actividad-2-el-desafío-del-conflicto"/></text:h>
      <text:p text:style-name="Standard">Objetivo: Provocar y resolver un conflicto de forma controlada.</text:p>
      <text:list text:style-name="L3">
        <text:list-item>
          <text:p text:style-name="P3">En tu repositorio actual, asegúrate de estar en la rama main.</text:p>
        </text:list-item>
        <text:list-item>
          <text:p text:style-name="P3">Crea un archivo llamado conflicto.txt con el contenido "Versión A". Hazle add y commit.</text:p>
        </text:list-item>
        <text:list-item>
          <text:p text:style-name="P3">Crea una rama llamada rama-b y cámbiate a ella.</text:p>
        </text:list-item>
        <text:list-item>
          <text:p text:style-name="P3">En rama-b, edita conflicto.txt y cambia su contenido a "Versión B". Haz add y commit.</text:p>
        </text:list-item>
        <text:list-item>
          <text:p text:style-name="P3">Vuelve a la rama main.</text:p>
        </text:list-item>
        <text:list-item>
          <text:p text:style-name="P3">Edita conflicto.txt en main y cambia su contenido a "Versión C". Haz add y commit.</text:p>
        </text:list-item>
        <text:list-item>
          <text:p text:style-name="P3">Intenta fusionar la rama: git merge rama-b.</text:p>
        </text:list-item>
        <text:list-item>
          <text:p text:style-name="P3">¡Conflicto detectado! Abre el archivo, resuelve la situación eligiendo qué texto quieres dejar (ej. "Versión C y B combinadas"), borra las marcas de Git, haz git add y finalmente git commit.</text:p>
        </text:list-item>
      </text:list>
      <text:p text:style-name="Standard"/>
      <text:h text:style-name="Heading_20_2" text:outline-level="2"><text:bookmark-start text:name="soluciones-a-las-actividades"/>8. Soluciones a las Actividades<text:bookmark-end text:name="soluciones-a-las-actividades"/></text:h>
      <text:h text:style-name="Heading_20_3" text:outline-level="3"><text:bookmark-start text:name="solución-actividad-1"/>Solución Actividad 1<text:bookmark-end text:name="solución-actividad-1"/></text:h>
      <text:p text:style-name="Standard">git init</text:p>
      <text:p text:style-name="Standard">touch base.txt</text:p>
      <text:p text:style-name="Standard">git add base.txt</text:p>
      <text:p text:style-name="Standard">git commit -m "Primer archivo"</text:p>
      <text:p text:style-name="Standard">git branch desarrollo</text:p>
      <text:p text:style-name="Standard"><text:soft-page-break/>git switch desarrollo</text:p>
      <text:p text:style-name="Standard">touch prueba.txt</text:p>
      <text:p text:style-name="Standard">git add prueba.txt</text:p>
      <text:p text:style-name="Standard">git commit -m "Archivo de prueba en rama desarrollo"</text:p>
      <text:p text:style-name="Standard">git switch master <text:s/># o main</text:p>
      <text:p text:style-name="Standard">ls</text:p>
      <text:p text:style-name="Standard"># Resultado: solo verás base.txt, prueba.txt no está en master aún.</text:p>
      <text:h text:style-name="Heading_20_3" text:outline-level="3"><text:bookmark-start text:name="solución-actividad-2"/>Solución Actividad 2<text:bookmark-end text:name="solución-actividad-2"/></text:h>
      <text:p text:style-name="Standard">Los pasos para resolver el conflicto tras el error de fusión son: 1. nano conflicto.txt (o tu editor preferido). 2. Borrar las marcas y dejar el texto deseado: Versión C y B combinadas. 3. git add conflicto.txt 4. git commit -m "Resolución de conflicto en archivo de prueba"</text:p>
      <text:p text:style-name="Standard"/>
      <text:h text:style-name="Heading_20_2" text:outline-level="2"><text:bookmark-start text:name="materiales-para-profundizar"/>9. Materiales para Profundizar<text:bookmark-end text:name="materiales-para-profundizar"/></text:h>
      <text:list text:style-name="List_20_1">
        <text:list-item>
          <text:p text:style-name="P4">Aprendizaje Interactivo: <text:a xlink:type="simple" xlink:href="https://learngitbranching.js.org/" text:style-name="Internet_20_link" text:visited-style-name="Visited_20_Internet_20_Link"><text:span text:style-name="Definition">Learn Git Branching</text:span></text:a> - Un juego increíble para visualizar ramas y fusiones de forma gráfica. Es la mejor herramienta para entender esto visualmente.</text:p>
        </text:list-item>
        <text:list-item>
          <text:p text:style-name="P4">Documentación oficial sobre Merging: <text:a xlink:type="simple" xlink:href="https://git-scm.com/docs/git-merge" text:style-name="Internet_20_link" text:visited-style-name="Visited_20_Internet_20_Link"><text:span text:style-name="Definition">git-merge documentation</text:span></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Narrow" svg:font-family="'Arial Narrow'" style:font-family-generic="roman" style:font-pitch="variable"/>
    <style:font-face style:name="Arial Unicode MS" svg:font-family="'Arial Unicode MS'" style:font-family-generic="system"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Courier New" svg:font-family="'Courier New'" style:font-family-generic="modern"/>
    <style:font-face style:name="Courier New1" svg:font-family="'Courier New'" style:font-family-generic="system" style:font-pitch="variable"/>
    <style:font-face style:name="Liberation Sans" svg:font-family="'Liberation Sans'" style:font-family-generic="swiss" style:font-pitch="variable"/>
    <style:font-face style:name="SF Mono" svg:font-family="'SF Mono'" style:font-adornments="Normal" style:font-pitch="variable"/>
    <style:font-face style:name="StarSymbol" svg:font-family="StarSymbol" style:font-charset="x-symbol"/>
    <style:font-face style:name="Symbol" svg:font-family="Symbo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s" fo:country="ES" style:letter-kerning="tru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Times New Roman" fo:font-size="12pt" fo:language="es" fo:country="ES" style:letter-kerning="tru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left" style:justify-single-word="false" fo:orphans="2" fo:widows="2" style:writing-mode="lr-tb"/>
      <style:text-properties style:font-name="Arial2" fo:font-family="Arial" style:font-style-name="Normal" style:font-family-generic="swiss" style:font-pitch="variable" fo:font-size="12pt" style:font-size-asian="12pt" style:font-size-complex="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fo:text-align="justify" style:justify-single-word="false" style:writing-mode="lr-tb"/>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Paragraph" style:display-name="List Paragraph" style:family="paragraph" style:parent-style-name="Standard" style:default-outline-level="">
      <style:paragraph-properties fo:margin-left="1.249cm" fo:margin-right="0cm"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 style:display-name="Heading 1" style:family="paragraph" style:parent-style-name="Heading" style:class="chapter" style:master-page-name="">
      <loext:graphic-properties draw:fill="solid" draw:fill-color="#82005e"/>
      <style:paragraph-properties fo:margin-top="0.6cm" fo:margin-bottom="0.4cm" style:contextual-spacing="false" style:page-number="auto" fo:background-color="#82005e" fo:padding="0.199cm" fo:border="0.06pt solid #000000" style:shadow="none" style:writing-mode="lr-tb"/>
      <style:text-properties fo:text-transform="uppercase" fo:color="#ffffff" loext:opacity="100%" style:font-name="Arial1" fo:font-family="Arial" style:font-style-name="Negrita" style:font-family-generic="swiss" style:font-pitch="variable" fo:font-size="18pt" fo:font-weight="bold"/>
    </style:style>
    <style:style style:name="Heading_20_2" style:display-name="Heading 2" style:family="paragraph" style:parent-style-name="Heading" style:class="chapter">
      <style:paragraph-properties style:writing-mode="lr-tb"/>
      <style:text-properties style:font-name="Arial1" fo:font-family="Arial" style:font-style-name="Negrita" style:font-family-generic="swiss" style:font-pitch="variable" fo:font-weight="bold"/>
    </style:style>
    <style:style style:name="Table_20_Heading" style:display-name="Table Heading" style:family="paragraph" style:parent-style-name="Table_20_Contents" style:class="extra"/>
    <style:style style:name="Heading_20_3" style:display-name="Heading 3" style:family="paragraph" style:parent-style-name="Heading" style:next-style-name="Text_20_body" style:default-outline-level="3" style:class="chapter">
      <style:paragraph-properties style:writing-mode="lr-tb"/>
      <style:text-properties fo:color="#82005e" loext:opacity="100%" fo:font-size="14pt" fo:font-weight="bold" style:font-size-asian="14pt" style:font-weight-asian="bold" style:font-size-complex="14pt" style:font-weight-complex="bold"/>
    </style:style>
    <style:style style:name="List_20_Heading" style:display-name="List Heading" style:family="paragraph" style:parent-style-name="Standard" style:class="html"/>
    <style:style style:name="Default_20_Paragraph_20_Font" style:display-name="Default Paragraph Font" style:family="text"/>
    <style:style style:name="Encabezado_20_Car" style:display-name="Encabezado Car" style:family="text" style:parent-style-name="Default_20_Paragraph_20_Font">
      <style:text-properties fo:font-size="12pt" style:font-size-asian="12pt" style:font-size-complex="12pt"/>
    </style:style>
    <style:style style:name="Pie_20_de_20_página_20_Car" style:display-name="Pie de página Car" style:family="text" style:parent-style-name="Default_20_Paragraph_20_Font">
      <style:text-properties fo:font-size="12pt" style:font-size-asian="12pt" style:font-size-complex="12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2a6099" loext:opacity="100%" style:font-name="SF Mono" fo:font-family="'SF Mono'" style:font-style-name="Normal" style:font-pitch="variable" fo:font-size="11pt"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Visited_20_Internet_20_Link" style:display-name="Visited Internet Link" style:family="text" style:parent-style-name="Internet_20_link">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Emphasis" style:family="text">
      <style:text-properties fo:font-style="italic" style:font-style-asian="italic" style:font-style-complex="italic"/>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text:bullet-char="">
        <style:list-level-properties text:min-label-width="0.635cm"/>
        <style:text-properties style:font-name="Symbol"/>
      </text:list-level-style-bullet>
      <text:list-level-style-bullet text:level="2" text:style-name="WW8Num2z1" loext:num-list-format="%2%" text:bullet-char="o">
        <style:list-level-properties text:space-before="1.27cm" text:min-label-width="0.635cm"/>
        <style:text-properties fo:font-family="'Courier New'" style:font-family-generic="modern" style:font-pitch="fixed"/>
      </text:list-level-style-bullet>
      <text:list-level-style-bullet text:level="3" text:style-name="WW8Num2z2" loext:num-list-format="%3%" text:bullet-char="">
        <style:list-level-properties text:space-before="2.54cm" text:min-label-width="0.635cm"/>
        <style:text-properties style:font-name="Wingdings"/>
      </text:list-level-style-bullet>
      <text:list-level-style-bullet text:level="4" text:style-name="WW8Num2z3" loext:num-list-format="%4%" text:bullet-char="">
        <style:list-level-properties text:space-before="3.81cm" text:min-label-width="0.635cm"/>
        <style:text-properties style:font-name="Symbol"/>
      </text:list-level-style-bullet>
      <text:list-level-style-bullet text:level="5" text:style-name="WW8Num2z1" loext:num-list-format="%5%" text:bullet-char="o">
        <style:list-level-properties text:space-before="5.08cm" text:min-label-width="0.635cm"/>
        <style:text-properties fo:font-family="'Courier New'" style:font-family-generic="modern" style:font-pitch="fixed"/>
      </text:list-level-style-bullet>
      <text:list-level-style-bullet text:level="6" text:style-name="WW8Num2z2" loext:num-list-format="%6%" text:bullet-char="">
        <style:list-level-properties text:space-before="6.35cm" text:min-label-width="0.635cm"/>
        <style:text-properties style:font-name="Wingdings"/>
      </text:list-level-style-bullet>
      <text:list-level-style-bullet text:level="7" text:style-name="WW8Num2z3" loext:num-list-format="%7%" text:bullet-char="">
        <style:list-level-properties text:space-before="7.62cm" text:min-label-width="0.635cm"/>
        <style:text-properties style:font-name="Symbol"/>
      </text:list-level-style-bullet>
      <text:list-level-style-bullet text:level="8" text:style-name="WW8Num2z1" loext:num-list-format="%8%" text:bullet-char="o">
        <style:list-level-properties text:space-before="8.89cm" text:min-label-width="0.635cm"/>
        <style:text-properties fo:font-family="'Courier New'" style:font-family-generic="modern" style:font-pitch="fixed"/>
      </text:list-level-style-bullet>
      <text:list-level-style-bullet text:level="9" text:style-name="WW8Num2z2"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1" number:language="es" number:country="ES" number:title="Definido por el usuario">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1" style:family="table">
      <style:table-properties style:width="18.182cm" fo:margin-left="-0.053cm" fo:margin-top="0cm" fo:margin-bottom="0cm" table:align="left" style:may-break-between-rows="false" style:writing-mode="lr-tb"/>
    </style:style>
    <style:style style:name="Tabla1.A" style:family="table-column">
      <style:table-column-properties style:column-width="4.196cm"/>
    </style:style>
    <style:style style:name="Tabla1.B" style:family="table-column">
      <style:table-column-properties style:column-width="13.986cm"/>
    </style:style>
    <style:style style:name="Tabla1.1" style:family="table-row">
      <style:table-row-properties style:min-row-height="0.951cm" fo:keep-together="always"/>
    </style:style>
    <style:style style:name="Tabla1.A1" style:family="table-cell">
      <style:table-cell-properties style:vertical-align="middle" fo:padding-left="0.123cm" fo:padding-right="0.123cm" fo:padding-top="0cm" fo:padding-bottom="0cm" fo:border="none"/>
    </style:style>
    <style:style style:name="Tabla2" style:family="table">
      <style:table-properties style:width="17.457cm" fo:margin-left="-0.191cm" fo:margin-top="0cm" fo:margin-bottom="0cm" table:align="left" style:writing-mode="lr-tb"/>
    </style:style>
    <style:style style:name="Tabla2.A" style:family="table-column">
      <style:table-column-properties style:column-width="3.784cm"/>
    </style:style>
    <style:style style:name="Tabla2.B" style:family="table-column">
      <style:table-column-properties style:column-width="11.501cm"/>
    </style:style>
    <style:style style:name="Tabla2.C" style:family="table-column">
      <style:table-column-properties style:column-width="2.173cm"/>
    </style:style>
    <style:style style:name="Tabla2.1" style:family="table-row">
      <style:table-row-properties fo:keep-together="auto"/>
    </style:style>
    <style:style style:name="Tabla2.A1" style:family="table-cell">
      <style:table-cell-properties style:vertical-align="middle" fo:padding-left="0.191cm" fo:padding-right="0.191cm" fo:padding-top="0cm" fo:padding-bottom="0cm" fo:border-left="none" fo:border-right="none" fo:border-top="0.5pt solid #00000a" fo:border-bottom="0.5pt solid #00000a"/>
    </style:style>
    <style:style style:name="MP1" style:family="paragraph" style:parent-style-name="Standard">
      <style:paragraph-properties fo:text-align="center" style:justify-single-word="false"/>
    </style:style>
    <style:style style:name="MP2" style:family="paragraph" style:parent-style-name="Standard">
      <style:paragraph-properties fo:text-align="center" style:justify-single-word="false"/>
      <style:text-properties fo:color="#82005e" loext:opacity="100%" style:font-name="Arial Narrow" fo:font-weight="bold" officeooo:rsid="002f20c4" officeooo:paragraph-rsid="0072042a" style:font-weight-asian="bold" style:font-weight-complex="bold"/>
    </style:style>
    <style:style style:name="MP3" style:family="paragraph" style:parent-style-name="Standard">
      <style:paragraph-properties fo:text-align="center" style:justify-single-word="false"/>
      <style:text-properties fo:color="#3d4d59" loext:opacity="100%" style:font-name="Arial Narrow" fo:font-weight="bold" officeooo:rsid="00481002" officeooo:paragraph-rsid="0072042a" style:font-weight-asian="bold" style:font-weight-complex="bold"/>
    </style:style>
    <style:style style:name="MP4" style:family="paragraph" style:parent-style-name="Header">
      <style:text-properties fo:font-size="3pt" style:font-size-asian="3pt" style:font-size-complex="3pt"/>
    </style:style>
    <style:style style:name="MP5" style:family="paragraph" style:parent-style-name="Standard">
      <style:text-properties officeooo:paragraph-rsid="00578e4d"/>
    </style:style>
    <style:style style:name="MP6" style:family="paragraph" style:parent-style-name="Footer">
      <style:paragraph-properties fo:text-align="right" style:justify-single-word="false">
        <style:tab-stops>
          <style:tab-stop style:position="15cm" style:type="right"/>
        </style:tab-stops>
      </style:paragraph-properties>
      <style:text-properties style:font-name="Arial"/>
    </style:style>
    <style:style style:name="MT1" style:family="text">
      <style:text-properties officeooo:rsid="00481002"/>
    </style:style>
    <style:style style:name="MT2" style:family="text">
      <style:text-properties style:font-name="Arial" fo:font-size="8pt" officeooo:rsid="0017aa89" style:font-size-asian="8pt" style:font-size-complex="8pt"/>
    </style:style>
    <style:style style:name="MT3" style:family="text">
      <style:text-properties style:font-name="Arial" fo:font-size="8pt" style:font-size-asian="8pt" style:font-size-complex="8pt"/>
    </style:style>
    <style:style style:name="MT4" style:family="text">
      <style:text-properties style:font-name="Arial" fo:font-size="8pt" officeooo:rsid="00578e4d" style:font-size-asian="8pt" style:font-size-complex="8pt"/>
    </style:style>
    <style:style style:name="MT5" style:family="text">
      <style:text-properties fo:font-family="'SF Mono'" style:font-pitch="variable" fo:font-size="8pt" officeooo:rsid="00578e4d" style:font-size-asian="8pt" style:font-size-complex="8pt"/>
    </style:style>
    <style:style style:name="MT6" style:family="text">
      <style:text-properties fo:font-family="'SF Mono'" style:font-pitch="variable" fo:font-size="8pt" style:font-size-asian="8pt" style:font-size-complex="8pt"/>
    </style:style>
    <style:style style:name="MT7" style:family="text">
      <style:text-properties fo:font-size="8pt" style:font-size-asian="8pt" style:font-family-complex="Calibri" style:font-family-generic-complex="system" style:font-pitch-complex="variable" style:font-size-complex="8pt"/>
    </style:style>
    <style:style style:name="Mfr1" style:family="graphic" style:parent-style-name="Graphics">
      <style:graphic-properties style:protect="content size position" style:vertical-pos="top" style:vertical-rel="baseli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top="0.101cm" fo:margin-bottom="0.101cm" style:protect="content size position"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51cm" fo:margin-bottom="0.318cm" fo:margin-left="2cm" fo:margin-right="1.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75cm" fo:margin-left="0cm" fo:margin-right="0cm" fo:margin-bottom="1.649cm" fo:background-color="transparent" style:dynamic-spacing="true" draw:fill="none" draw:fill-color="#729fcf"/>
      </style:header-style>
      <style:footer-style>
        <style:header-footer-properties fo:min-height="1.184cm" fo:margin-left="0cm" fo:margin-right="0cm" fo:margin-top="1.08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1" table:style-name="Tabla1">
          <table:table-column table:style-name="Tabla1.A"/>
          <table:table-column table:style-name="Tabla1.B"/>
          <table:table-row table:style-name="Tabla1.1">
            <table:table-cell table:style-name="Tabla1.A1" office:value-type="string">
              <text:p text:style-name="MP1"><draw:frame draw:style-name="Mfr1" draw:name="Imagen1" text:anchor-type="as-char" svg:width="3.949cm" svg:height="1.499cm" draw:z-index="3"><draw:image xlink:href="Pictures/100012FE00001118000006B586973F00.svg" xlink:type="simple" xlink:show="embed" xlink:actuate="onLoad" draw:mime-type="image/svg+xml"/><draw:image xlink:href="Pictures/100000010000008C000000371E2AAA60.png" xlink:type="simple" xlink:show="embed" xlink:actuate="onLoad" draw:mime-type="image/png"/></draw:frame></text:p>
            </table:table-cell>
            <table:table-cell table:style-name="Tabla1.A1" office:value-type="string">
              <text:p text:style-name="MP2">CFGS – <text:span text:style-name="MT1">DESARROLLO DE APLICACIONES MULTIPLATAFORMA</text:span></text:p>
              <text:p text:style-name="MP3">PROGRAMACIÓN – 2018/2019</text:p>
            </table:table-cell>
          </table:table-row>
        </table:table>
        <text:p text:style-name="MP4"/>
      </style:header>
      <style:foot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Footer"><draw:frame draw:style-name="Mfr2" draw:name="Imagen3" text:anchor-type="as-char" svg:width="3.175cm" svg:height="1.111cm" draw:z-index="7"><draw:image xlink:href="Pictures/100027FC00000C670000045707B6B994.svg" xlink:type="simple" xlink:show="embed" xlink:actuate="onLoad" draw:mime-type="image/svg+xml"/><draw:image xlink:href="Pictures/1000000100000065000000239CE48809.png" xlink:type="simple" xlink:show="embed" xlink:actuate="onLoad" draw:mime-type="image/png"/></draw:frame></text:p>
            </table:table-cell>
            <table:table-cell table:style-name="Tabla2.A1" office:value-type="string">
              <text:p text:style-name="MP5"><text:span text:style-name="MT2">Excepto si se especifica lo contrario, esta obra está bajo l</text:span><text:span text:style-name="MT3">icenci</text:span><text:span text:style-name="MT4">a </text:span><text:a xlink:type="simple" xlink:href="https://creativecommons.org/licenses/by/4.0/deed.es_ES" text:style-name="Internet_20_link" text:visited-style-name="Visited_20_Internet_20_Link"><text:span text:style-name="MT5">CC BY 4.0</text:span></text:a><text:span text:style-name="MT4">.</text:span></text:p>
              <text:p text:style-name="Standard"><text:span text:style-name="MT2">© </text:span><text:span text:style-name="MT2"><text:date style:data-style-name="N10111" text:date-value="2026-06-18T16:28:07.196758878">2026</text:date></text:span><text:span text:style-name="MT2"><text:s/>Departamento de Informática, </text:span><text:a xlink:type="simple" xlink:href="http://www.egibide.org/" text:style-name="Internet_20_link" text:visited-style-name="Visited_20_Internet_20_Link"><text:span text:style-name="MT6">Egibide</text:span></text:a><text:span text:style-name="MT2">. Algunos derechos reservados.</text:span></text:p>
            </table:table-cell>
            <table:table-cell table:style-name="Tabla2.A1" office:value-type="string">
              <text:p text:style-name="MP6"><text:span text:style-name="MT7">Página </text:span><text:span text:style-name="MT7"><text:page-number text:select-page="current">4</text:page-number></text:span></text:p>
            </table:table-cell>
          </table:table-row>
        </table:table>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Descripción del reto</dc:title>
    <meta:editing-cycles>55</meta:editing-cycles>
    <meta:creation-date>2017-05-26T13:24:30.395479000</meta:creation-date>
    <meta:editing-duration>PT3H49M25S</meta:editing-duration>
    <meta:generator>LibreOffice/26.2.4.2$MacOSX_AARCH64 LibreOffice_project/0229ac93fcf0d7cbc6376066c6f35021cef002dc</meta:generator>
    <dc:date>2026-06-18T16:28:07.153419000</dc:date>
    <meta:document-statistic meta:table-count="2" meta:image-count="2" meta:object-count="0" meta:page-count="4" meta:paragraph-count="94" meta:word-count="1161" meta:character-count="6995" meta:non-whitespace-character-count="5950"/>
    <meta:user-defined meta:name="AppVersion">12.0000</meta:user-defined>
    <meta:user-defined meta:name="Company">Egibide</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