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YuGothic" svg:font-family="YuGothic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lumno/a</text:p>
          </table:table-cell>
          <table:table-cell table:style-name="ce1" office:value-type="string" calcext:value-type="string">
            <text:p>Nº visitas</text:p>
          </table:table-cell>
          <table:table-cell table:style-name="ce1" office:value-type="string" calcext:value-type="string">
            <text:p>Ritmo</text:p>
          </table:table-cell>
        </table:table-row>
        <table:table-row table:style-name="ro1">
          <table:table-cell office:value-type="string" calcext:value-type="string">
            <text:p>Alumno/a 1</text:p>
          </table:table-cell>
          <table:table-cell office:value-type="float" office:value="2" calcext:value-type="float">
            <text:p>2</text:p>
          </table:table-cell>
          <table:table-cell table:formula="of:==IF([.B2]&lt;=2;&quot;Alto&quot;;IF([.B2]&lt;=6;&quot;Medio&quot;;&quot;Bajo&quot;))" office:value-type="string" office:string-value="Alto" calcext:value-type="string">
            <text:p>Alto</text:p>
          </table:table-cell>
        </table:table-row>
        <table:table-row table:style-name="ro1">
          <table:table-cell office:value-type="string" calcext:value-type="string">
            <text:p>Alumno/a 2</text:p>
          </table:table-cell>
          <table:table-cell office:value-type="float" office:value="5" calcext:value-type="float">
            <text:p>5</text:p>
          </table:table-cell>
          <table:table-cell table:formula="of:==IF([.B3]&lt;=2;&quot;Alto&quot;;IF([.B3]&lt;=6;&quot;Medio&quot;;&quot;Bajo&quot;))" office:value-type="string" office:string-value="Medio" calcext:value-type="string">
            <text:p>Medio</text:p>
          </table:table-cell>
        </table:table-row>
        <table:table-row table:style-name="ro1">
          <table:table-cell office:value-type="string" calcext:value-type="string">
            <text:p>Alumno/a 3</text:p>
          </table:table-cell>
          <table:table-cell office:value-type="float" office:value="2" calcext:value-type="float">
            <text:p>2</text:p>
          </table:table-cell>
          <table:table-cell table:formula="of:==IF([.B4]&lt;=2;&quot;Alto&quot;;IF([.B4]&lt;=6;&quot;Medio&quot;;&quot;Bajo&quot;))" office:value-type="string" office:string-value="Alto" calcext:value-type="string">
            <text:p>Alto</text:p>
          </table:table-cell>
        </table:table-row>
        <table:table-row table:style-name="ro1">
          <table:table-cell office:value-type="string" calcext:value-type="string">
            <text:p>Alumno/a 4</text:p>
          </table:table-cell>
          <table:table-cell office:value-type="float" office:value="2" calcext:value-type="float">
            <text:p>2</text:p>
          </table:table-cell>
          <table:table-cell table:formula="of:==IF([.B5]&lt;=2;&quot;Alto&quot;;IF([.B5]&lt;=6;&quot;Medio&quot;;&quot;Bajo&quot;))" office:value-type="string" office:string-value="Alto" calcext:value-type="string">
            <text:p>Alto</text:p>
          </table:table-cell>
        </table:table-row>
        <table:table-row table:style-name="ro1">
          <table:table-cell office:value-type="string" calcext:value-type="string">
            <text:p>Alumno/a 5</text:p>
          </table:table-cell>
          <table:table-cell office:value-type="float" office:value="2" calcext:value-type="float">
            <text:p>2</text:p>
          </table:table-cell>
          <table:table-cell table:formula="of:==IF([.B6]&lt;=2;&quot;Alto&quot;;IF([.B6]&lt;=6;&quot;Medio&quot;;&quot;Bajo&quot;))" office:value-type="string" office:string-value="Alto" calcext:value-type="string">
            <text:p>Alto</text:p>
          </table:table-cell>
        </table:table-row>
        <table:table-row table:style-name="ro1">
          <table:table-cell office:value-type="string" calcext:value-type="string">
            <text:p>Alumno/a 6</text:p>
          </table:table-cell>
          <table:table-cell office:value-type="float" office:value="15" calcext:value-type="float">
            <text:p>15</text:p>
          </table:table-cell>
          <table:table-cell table:formula="of:==IF([.B7]&lt;=2;&quot;Alto&quot;;IF([.B7]&lt;=6;&quot;Medio&quot;;&quot;Bajo&quot;))" office:value-type="string" office:string-value="Bajo" calcext:value-type="string">
            <text:p>Bajo</text:p>
          </table:table-cell>
        </table:table-row>
        <table:table-row table:style-name="ro1">
          <table:table-cell office:value-type="string" calcext:value-type="string">
            <text:p>Alumno/a 7</text:p>
          </table:table-cell>
          <table:table-cell office:value-type="float" office:value="5" calcext:value-type="float">
            <text:p>5</text:p>
          </table:table-cell>
          <table:table-cell table:formula="of:==IF([.B8]&lt;=2;&quot;Alto&quot;;IF([.B8]&lt;=6;&quot;Medio&quot;;&quot;Bajo&quot;))" office:value-type="string" office:string-value="Medio" calcext:value-type="string">
            <text:p>Medio</text:p>
          </table:table-cell>
        </table:table-row>
        <table:table-row table:style-name="ro1">
          <table:table-cell office:value-type="string" calcext:value-type="string">
            <text:p>Alumno/a 8</text:p>
          </table:table-cell>
          <table:table-cell office:value-type="float" office:value="3" calcext:value-type="float">
            <text:p>3</text:p>
          </table:table-cell>
          <table:table-cell table:formula="of:==IF([.B9]&lt;=2;&quot;Alto&quot;;IF([.B9]&lt;=6;&quot;Medio&quot;;&quot;Bajo&quot;))" office:value-type="string" office:string-value="Medio" calcext:value-type="string">
            <text:p>Medio</text:p>
          </table:table-cell>
        </table:table-row>
        <table:table-row table:style-name="ro1">
          <table:table-cell office:value-type="string" calcext:value-type="string">
            <text:p>Alumno/a 9</text:p>
          </table:table-cell>
          <table:table-cell office:value-type="float" office:value="4" calcext:value-type="float">
            <text:p>4</text:p>
          </table:table-cell>
          <table:table-cell table:formula="of:==IF([.B10]&lt;=2;&quot;Alto&quot;;IF([.B10]&lt;=6;&quot;Medio&quot;;&quot;Bajo&quot;))" office:value-type="string" office:string-value="Medio" calcext:value-type="string">
            <text:p>Medio</text:p>
          </table:table-cell>
        </table:table-row>
        <table:table-row table:style-name="ro1">
          <table:table-cell office:value-type="string" calcext:value-type="string">
            <text:p>Alumno/a 10</text:p>
          </table:table-cell>
          <table:table-cell office:value-type="float" office:value="3" calcext:value-type="float">
            <text:p>3</text:p>
          </table:table-cell>
          <table:table-cell table:formula="of:==IF([.B11]&lt;=2;&quot;Alto&quot;;IF([.B11]&lt;=6;&quot;Medio&quot;;&quot;Bajo&quot;))" office:value-type="string" office:string-value="Medio" calcext:value-type="string">
            <text:p>Medio</text:p>
          </table:table-cell>
        </table:table-row>
        <table:table-row table:style-name="ro1">
          <table:table-cell office:value-type="string" calcext:value-type="string">
            <text:p>Alumno/a 11</text:p>
          </table:table-cell>
          <table:table-cell office:value-type="float" office:value="42" calcext:value-type="float">
            <text:p>42</text:p>
          </table:table-cell>
          <table:table-cell table:formula="of:==IF([.B12]&lt;=2;&quot;Alto&quot;;IF([.B12]&lt;=6;&quot;Medio&quot;;&quot;Bajo&quot;))" office:value-type="string" office:string-value="Bajo" calcext:value-type="string">
            <text:p>Bajo</text:p>
          </table:table-cell>
        </table:table-row>
        <table:table-row table:style-name="ro1">
          <table:table-cell office:value-type="string" calcext:value-type="string">
            <text:p>Alumno/a 12</text:p>
          </table:table-cell>
          <table:table-cell office:value-type="float" office:value="10" calcext:value-type="float">
            <text:p>10</text:p>
          </table:table-cell>
          <table:table-cell table:formula="of:==IF([.B13]&lt;=2;&quot;Alto&quot;;IF([.B13]&lt;=6;&quot;Medio&quot;;&quot;Bajo&quot;))" office:value-type="string" office:string-value="Bajo" calcext:value-type="string">
            <text:p>Bajo</text:p>
          </table:table-cell>
        </table:table-row>
        <table:table-row table:style-name="ro1">
          <table:table-cell office:value-type="string" calcext:value-type="string">
            <text:p>Alumno/a 13</text:p>
          </table:table-cell>
          <table:table-cell office:value-type="float" office:value="2" calcext:value-type="float">
            <text:p>2</text:p>
          </table:table-cell>
          <table:table-cell table:formula="of:==IF([.B14]&lt;=2;&quot;Alto&quot;;IF([.B14]&lt;=6;&quot;Medio&quot;;&quot;Bajo&quot;))" office:value-type="string" office:string-value="Alto" calcext:value-type="string">
            <text:p>Alto</text:p>
          </table:table-cell>
        </table:table-row>
        <table:table-row table:style-name="ro1">
          <table:table-cell office:value-type="string" calcext:value-type="string">
            <text:p>Alumno/a 14</text:p>
          </table:table-cell>
          <table:table-cell office:value-type="float" office:value="2" calcext:value-type="float">
            <text:p>2</text:p>
          </table:table-cell>
          <table:table-cell table:formula="of:==IF([.B15]&lt;=2;&quot;Alto&quot;;IF([.B15]&lt;=6;&quot;Medio&quot;;&quot;Bajo&quot;))" office:value-type="string" office:string-value="Alto" calcext:value-type="string">
            <text:p>Alto</text:p>
          </table:table-cell>
        </table:table-row>
        <table:table-row table:style-name="ro1">
          <table:table-cell office:value-type="string" calcext:value-type="string">
            <text:p>Alumno/a 15</text:p>
          </table:table-cell>
          <table:table-cell office:value-type="float" office:value="2" calcext:value-type="float">
            <text:p>2</text:p>
          </table:table-cell>
          <table:table-cell table:formula="of:==IF([.B16]&lt;=2;&quot;Alto&quot;;IF([.B16]&lt;=6;&quot;Medio&quot;;&quot;Bajo&quot;))" office:value-type="string" office:string-value="Alto" calcext:value-type="string">
            <text:p>Alto</text:p>
          </table:table-cell>
        </table:table-row>
        <table:table-row table:style-name="ro1">
          <table:table-cell office:value-type="string" calcext:value-type="string">
            <text:p>Alumno/a 16</text:p>
          </table:table-cell>
          <table:table-cell office:value-type="float" office:value="2" calcext:value-type="float">
            <text:p>2</text:p>
          </table:table-cell>
          <table:table-cell table:formula="of:==IF([.B17]&lt;=2;&quot;Alto&quot;;IF([.B17]&lt;=6;&quot;Medio&quot;;&quot;Bajo&quot;))" office:value-type="string" office:string-value="Alto" calcext:value-type="string">
            <text:p>Alto</text:p>
          </table:table-cell>
        </table:table-row>
        <table:table-row table:style-name="ro1">
          <table:table-cell office:value-type="string" calcext:value-type="string">
            <text:p>Alumno/a 17</text:p>
          </table:table-cell>
          <table:table-cell office:value-type="float" office:value="2" calcext:value-type="float">
            <text:p>2</text:p>
          </table:table-cell>
          <table:table-cell table:formula="of:==IF([.B18]&lt;=2;&quot;Alto&quot;;IF([.B18]&lt;=6;&quot;Medio&quot;;&quot;Bajo&quot;))" office:value-type="string" office:string-value="Alto" calcext:value-type="string">
            <text:p>Alto</text:p>
          </table:table-cell>
        </table:table-row>
        <table:table-row table:style-name="ro1">
          <table:table-cell office:value-type="string" calcext:value-type="string">
            <text:p>Alumno/a 18</text:p>
          </table:table-cell>
          <table:table-cell office:value-type="float" office:value="4" calcext:value-type="float">
            <text:p>4</text:p>
          </table:table-cell>
          <table:table-cell table:formula="of:==IF([.B19]&lt;=2;&quot;Alto&quot;;IF([.B19]&lt;=6;&quot;Medio&quot;;&quot;Bajo&quot;))" office:value-type="string" office:string-value="Medio" calcext:value-type="string">
            <text:p>Medio</text:p>
          </table:table-cell>
        </table:table-row>
        <table:table-row table:style-name="ro1">
          <table:table-cell office:value-type="string" calcext:value-type="string">
            <text:p>Alumno/a 19</text:p>
          </table:table-cell>
          <table:table-cell office:value-type="float" office:value="2" calcext:value-type="float">
            <text:p>2</text:p>
          </table:table-cell>
          <table:table-cell table:formula="of:==IF([.B20]&lt;=2;&quot;Alto&quot;;IF([.B20]&lt;=6;&quot;Medio&quot;;&quot;Bajo&quot;))" office:value-type="string" office:string-value="Alto" calcext:value-type="string">
            <text:p>Alto</text:p>
          </table:table-cell>
        </table:table-row>
        <table:table-row table:style-name="ro1">
          <table:table-cell office:value-type="string" calcext:value-type="string">
            <text:p>Alumno/a 20</text:p>
          </table:table-cell>
          <table:table-cell office:value-type="float" office:value="2" calcext:value-type="float">
            <text:p>2</text:p>
          </table:table-cell>
          <table:table-cell table:formula="of:==IF([.B21]&lt;=2;&quot;Alto&quot;;IF([.B21]&lt;=6;&quot;Medio&quot;;&quot;Bajo&quot;))" office:value-type="string" office:string-value="Alto" calcext:value-type="string">
            <text:p>Alto</text:p>
          </table:table-cell>
        </table:table-row>
        <table:table-row table:style-name="ro1">
          <table:table-cell office:value-type="string" calcext:value-type="string">
            <text:p>Alumno/a 21</text:p>
          </table:table-cell>
          <table:table-cell office:value-type="float" office:value="3" calcext:value-type="float">
            <text:p>3</text:p>
          </table:table-cell>
          <table:table-cell table:formula="of:==IF([.B22]&lt;=2;&quot;Alto&quot;;IF([.B22]&lt;=6;&quot;Medio&quot;;&quot;Bajo&quot;))" office:value-type="string" office:string-value="Medio" calcext:value-type="string">
            <text:p>Medio</text:p>
          </table:table-cell>
        </table:table-row>
        <table:table-row table:style-name="ro1">
          <table:table-cell office:value-type="string" calcext:value-type="string">
            <text:p>Alumno/a 22</text:p>
          </table:table-cell>
          <table:table-cell office:value-type="float" office:value="2" calcext:value-type="float">
            <text:p>2</text:p>
          </table:table-cell>
          <table:table-cell table:formula="of:==IF([.B23]&lt;=2;&quot;Alto&quot;;IF([.B23]&lt;=6;&quot;Medio&quot;;&quot;Bajo&quot;))" office:value-type="string" office:string-value="Alto" calcext:value-type="string">
            <text:p>Alto</text:p>
          </table:table-cell>
        </table:table-row>
        <table:table-row table:style-name="ro1">
          <table:table-cell office:value-type="string" calcext:value-type="string">
            <text:p>Alumno/a 23</text:p>
          </table:table-cell>
          <table:table-cell office:value-type="float" office:value="3" calcext:value-type="float">
            <text:p>3</text:p>
          </table:table-cell>
          <table:table-cell table:formula="of:==IF([.B24]&lt;=2;&quot;Alto&quot;;IF([.B24]&lt;=6;&quot;Medio&quot;;&quot;Bajo&quot;))" office:value-type="string" office:string-value="Medio" calcext:value-type="string">
            <text:p>Medio</text:p>
          </table:table-cell>
        </table:table-row>
        <table:table-row table:style-name="ro1">
          <table:table-cell office:value-type="string" calcext:value-type="string">
            <text:p>Alumno/a 24</text:p>
          </table:table-cell>
          <table:table-cell office:value-type="float" office:value="11" calcext:value-type="float">
            <text:p>11</text:p>
          </table:table-cell>
          <table:table-cell table:formula="of:==IF([.B25]&lt;=2;&quot;Alto&quot;;IF([.B25]&lt;=6;&quot;Medio&quot;;&quot;Bajo&quot;))" office:value-type="string" office:string-value="Bajo" calcext:value-type="string">
            <text:p>Bajo</text:p>
          </table:table-cell>
        </table:table-row>
        <table:table-row table:style-name="ro1">
          <table:table-cell office:value-type="string" calcext:value-type="string">
            <text:p>Alumno/a 25</text:p>
          </table:table-cell>
          <table:table-cell office:value-type="float" office:value="6" calcext:value-type="float">
            <text:p>6</text:p>
          </table:table-cell>
          <table:table-cell table:formula="of:==IF([.B26]&lt;=2;&quot;Alto&quot;;IF([.B26]&lt;=6;&quot;Medio&quot;;&quot;Bajo&quot;))" office:value-type="string" office:string-value="Medio" calcext:value-type="string">
            <text:p>Medio</text:p>
          </table:table-cell>
        </table:table-row>
      </table:table>
      <table:named-expressions/>
      <table:database-ranges>
        <table:database-range table:name="Intervalo" table:target-range-address="Hoja1.A1:Hoja1.B26" table:on-update-keep-styles="true" table:on-update-keep-size="false"/>
        <table:database-range table:name="__Anonymous_Sheet_DB__0" table:target-range-address="Hoja1.A1:Hoja1.C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YuGothic" svg:font-family="Yu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YuGothic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Gothic" style:font-family-asian="YuGothic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 style:data-style-name="N2" text:time-value="17:36:04.486198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8T16:35:31.858883000</meta:creation-date>
    <dc:date>2026-05-18T17:37:13.044730000</dc:date>
    <meta:editing-duration>PT9M8S</meta:editing-duration>
    <meta:editing-cycles>8</meta:editing-cycles>
    <meta:generator>LibreOffice/26.2.3.2$MacOSX_AARCH64 LibreOffice_project/70e089b17412e4cb7773e41413306b17a2328c34</meta:generator>
    <meta:document-statistic meta:table-count="1" meta:cell-count="78" meta:object-count="0"/>
  </office:meta>
</office:document-meta>
</file>